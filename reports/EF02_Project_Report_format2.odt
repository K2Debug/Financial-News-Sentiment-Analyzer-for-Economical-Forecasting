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0E2000000DFED811BF6.jpg" manifest:media-type="image/jpeg"/>
  <manifest:file-entry manifest:full-path="Pictures/100000010000036E000001E54E4BEE63.png" manifest:media-type="image/png"/>
  <manifest:file-entry manifest:full-path="Pictures/10000001000005900000012D6A4D9845.png" manifest:media-type="image/png"/>
  <manifest:file-entry manifest:full-path="Pictures/100000000000078000000438D65192C3.png" manifest:media-type="image/png"/>
  <manifest:file-entry manifest:full-path="Pictures/10000000000003EB0000039C6974B984.png" manifest:media-type="image/png"/>
  <manifest:file-entry manifest:full-path="Pictures/10000000000003B500000131F410673B.png" manifest:media-type="image/png"/>
  <manifest:file-entry manifest:full-path="Pictures/1000000100000410000000E6BFC1726B.png" manifest:media-type="image/png"/>
  <manifest:file-entry manifest:full-path="Pictures/1000000100000434000002514803EDE0.png" manifest:media-type="image/png"/>
  <manifest:file-entry manifest:full-path="Pictures/1000000100000343000002E3FA792C04.png" manifest:media-type="image/png"/>
  <manifest:file-entry manifest:full-path="Pictures/10000001000006F50000024AF42B3477.png" manifest:media-type="image/png"/>
  <manifest:file-entry manifest:full-path="Pictures/10000001000005CB000002462854B35D.png" manifest:media-type="image/png"/>
  <manifest:file-entry manifest:full-path="Pictures/100000010000047C000003738740401C.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roman" style:font-pitch="variable" style:font-charset="x-symbol"/>
    <style:font-face style:name="Courier" svg:font-family="Courier"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imbusRomNo9L-Regu" svg:font-family="NimbusRomNo9L-Regu"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6.584in" fo:margin-left="0.1097in" fo:margin-top="0in" fo:margin-bottom="0in" table:align="left" style:writing-mode="page"/>
    </style:style>
    <style:style style:name="Table1.A" style:family="table-column">
      <style:table-column-properties style:column-width="0.5368in"/>
    </style:style>
    <style:style style:name="Table1.B" style:family="table-column">
      <style:table-column-properties style:column-width="3.3431in"/>
    </style:style>
    <style:style style:name="Table1.C" style:family="table-column">
      <style:table-column-properties style:column-width="1.4069in"/>
    </style:style>
    <style:style style:name="Table1.D" style:family="table-column">
      <style:table-column-properties style:column-width="1.2972in"/>
    </style:style>
    <style:style style:name="Table1.1" style:family="table-row">
      <style:table-row-properties style:min-row-height="0.3431in" fo:keep-together="auto"/>
    </style:style>
    <style:style style:name="Table1.A1" style:family="table-cell">
      <style:table-cell-properties fo:padding-left="0.075in" fo:padding-right="0.075in" fo:padding-top="0in" fo:padding-bottom="0in" fo:border="0.5pt solid #000000"/>
    </style:style>
    <style:style style:name="Table1.2" style:family="table-row">
      <style:table-row-properties style:min-row-height="0.2306in" fo:keep-together="auto"/>
    </style:style>
    <style:style style:name="Table1.3" style:family="table-row">
      <style:table-row-properties style:min-row-height="0.2493in" fo:keep-together="auto"/>
    </style:style>
    <style:style style:name="Table1.5" style:family="table-row">
      <style:table-row-properties style:min-row-height="0.3208in" fo:keep-together="auto"/>
    </style:style>
    <style:style style:name="Table8" style:family="table">
      <style:table-properties style:width="6.0556in" fo:margin-left="0in" fo:margin-top="0in" fo:margin-bottom="0in" table:align="left" style:writing-mode="page"/>
    </style:style>
    <style:style style:name="Table8.A" style:family="table-column">
      <style:table-column-properties style:column-width="0.4847in"/>
    </style:style>
    <style:style style:name="Table8.B" style:family="table-column">
      <style:table-column-properties style:column-width="2.6958in"/>
    </style:style>
    <style:style style:name="Table8.C" style:family="table-column">
      <style:table-column-properties style:column-width="1.625in"/>
    </style:style>
    <style:style style:name="Table8.D" style:family="table-column">
      <style:table-column-properties style:column-width="1.25in"/>
    </style:style>
    <style:style style:name="Table8.1" style:family="table-row">
      <style:table-row-properties fo:keep-together="auto"/>
    </style:style>
    <style:style style:name="Table8.A1" style:family="table-cell">
      <style:table-cell-properties fo:padding-left="0.075in" fo:padding-right="0.075in" fo:padding-top="0in" fo:padding-bottom="0in" fo:border="none"/>
    </style:style>
    <style:style style:name="Table2" style:family="table">
      <style:table-properties style:width="5.9611in" table:align="right" style:writing-mode="lr-tb"/>
    </style:style>
    <style:style style:name="Table2.A" style:family="table-column">
      <style:table-column-properties style:column-width="2.0368in"/>
    </style:style>
    <style:style style:name="Table2.B" style:family="table-column">
      <style:table-column-properties style:column-width="3.9243in"/>
    </style:style>
    <style:style style:name="Table2.A1" style:family="table-cell">
      <style:table-cell-properties fo:padding="0.0382in" fo:border-left="0.5pt solid #ffffff" fo:border-right="none" fo:border-top="0.5pt solid #ffffff" fo:border-bottom="0.5pt solid #ffffff"/>
    </style:style>
    <style:style style:name="Table2.B1" style:family="table-cell">
      <style:table-cell-properties fo:padding="0.0382in" fo:border="0.5pt solid #ffffff"/>
    </style:style>
    <style:style style:name="Table2.A2" style:family="table-cell">
      <style:table-cell-properties fo:padding="0.0382in" fo:border-left="0.5pt solid #ffffff" fo:border-right="none" fo:border-top="none" fo:border-bottom="0.5pt solid #ffffff"/>
    </style:style>
    <style:style style:name="Table2.B2" style:family="table-cell">
      <style:table-cell-properties fo:padding="0.0382in" fo:border-left="0.5pt solid #ffffff" fo:border-right="0.5pt solid #ffffff" fo:border-top="none" fo:border-bottom="0.5pt solid #ffffff"/>
    </style:style>
    <style:style style:name="Table4" style:family="table">
      <style:table-properties style:width="6.8868in" fo:margin-left="-0.4285in" fo:margin-top="0in" fo:margin-bottom="0in" fo:break-before="auto" fo:break-after="auto" table:align="left" fo:background-color="transparent" fo:keep-with-next="auto" style:may-break-between-rows="true" style:writing-mode="lr-tb">
        <style:background-image/>
      </style:table-properties>
    </style:style>
    <style:style style:name="Table4.A" style:family="table-column">
      <style:table-column-properties style:column-width="1.5743in"/>
    </style:style>
    <style:style style:name="Table4.B" style:family="table-column">
      <style:table-column-properties style:column-width="1.6778in"/>
    </style:style>
    <style:style style:name="Table4.C" style:family="table-column">
      <style:table-column-properties style:column-width="1.7056in"/>
    </style:style>
    <style:style style:name="Table4.D" style:family="table-column">
      <style:table-column-properties style:column-width="1.9292in"/>
    </style:style>
    <style:style style:name="Table4.1" style:family="table-row">
      <style:table-row-properties fo:background-color="transparent" fo:keep-together="auto">
        <style:background-image/>
      </style:table-row-properties>
    </style:style>
    <style:style style:name="Table4.A1" style:family="table-cell">
      <style:table-cell-properties fo:padding-left="0.075in" fo:padding-right="0.075in" fo:padding-top="0in" fo:padding-bottom="0in" fo:border="0.5pt solid #000000" style:writing-mode="lr-tb"/>
    </style:style>
    <style:style style:name="Table4.B1" style:family="table-cell">
      <style:table-cell-properties style:vertical-align="" fo:background-color="transparent"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C1" style:family="table-cell">
      <style:table-cell-properties style:vertical-align="" fo:background-color="transparent" fo:padding-left="0.075in" fo:padding-right="0.075in" fo:padding-top="0in" fo:padding-bottom="0in" fo:border-left="none" fo:border-right="none" fo:border-top="0.5pt solid #000000" fo:border-bottom="0.5pt solid #000000" style:writing-mode="lr-tb">
        <style:background-image/>
      </style:table-cell-properties>
    </style:style>
    <style:style style:name="Table4.D1" style:family="table-cell">
      <style:table-cell-properties style:vertical-align="" fo:background-color="transparent"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4.A2" style:family="table-cell">
      <style:table-cell-properties style:vertical-align="" fo:background-color="transparent" fo:padding-left="0.075in" fo:padding-right="0.075in" fo:padding-top="0in" fo:padding-bottom="0in" fo:border-left="0.5pt solid #000000" fo:border-right="none" fo:border-top="0.5pt solid #000000" fo:border-bottom="none" style:writing-mode="lr-tb">
        <style:background-image/>
      </style:table-cell-properties>
    </style:style>
    <style:style style:name="Table4.B2" style:family="table-cell">
      <style:table-cell-properties style:vertical-align="" fo:background-color="transparent" fo:padding-left="0.075in" fo:padding-right="0.075in" fo:padding-top="0in" fo:padding-bottom="0in" fo:border-left="none" fo:border-right="none" fo:border-top="0.5pt solid #000000" fo:border-bottom="none" style:writing-mode="lr-tb">
        <style:background-image/>
      </style:table-cell-properties>
    </style:style>
    <style:style style:name="Table4.D2" style:family="table-cell">
      <style:table-cell-properties style:vertical-align="" fo:background-color="transparent" fo:padding-left="0.075in" fo:padding-right="0.075in" fo:padding-top="0in" fo:padding-bottom="0in" fo:border-left="none" fo:border-right="0.5pt solid #000000" fo:border-top="0.5pt solid #000000" fo:border-bottom="none" style:writing-mode="lr-tb">
        <style:background-image/>
      </style:table-cell-properties>
    </style:style>
    <style:style style:name="Table4.A3" style:family="table-cell">
      <style:table-cell-properties style:vertical-align="" fo:background-color="transparent" fo:padding-left="0.075in" fo:padding-right="0.075in" fo:padding-top="0in" fo:padding-bottom="0in" fo:border-left="0.5pt solid #000000" fo:border-right="none" fo:border-top="none" fo:border-bottom="none" style:writing-mode="lr-tb">
        <style:background-image/>
      </style:table-cell-properties>
    </style:style>
    <style:style style:name="Table4.B3" style:family="table-cell">
      <style:table-cell-properties style:vertical-align="" fo:background-color="transparent" fo:padding-left="0.075in" fo:padding-right="0.075in" fo:padding-top="0in" fo:padding-bottom="0in" fo:border="none" style:writing-mode="lr-tb">
        <style:background-image/>
      </style:table-cell-properties>
    </style:style>
    <style:style style:name="Table4.D3" style:family="table-cell">
      <style:table-cell-properties style:vertical-align="" fo:background-color="transparent" fo:padding-left="0.075in" fo:padding-right="0.075in" fo:padding-top="0in" fo:padding-bottom="0in" fo:border-left="none" fo:border-right="0.5pt solid #000000" fo:border-top="none" fo:border-bottom="none" style:writing-mode="lr-tb">
        <style:background-image/>
      </style:table-cell-properties>
    </style:style>
    <style:style style:name="Table4.A7" style:family="table-cell">
      <style:table-cell-properties style:vertical-align="" fo:background-color="transparent" fo:padding-left="0.075in" fo:padding-right="0.075in" fo:padding-top="0in" fo:padding-bottom="0in" fo:border-left="0.5pt solid #000000" fo:border-right="none" fo:border-top="none" fo:border-bottom="0.5pt solid #000000" style:writing-mode="lr-tb">
        <style:background-image/>
      </style:table-cell-properties>
    </style:style>
    <style:style style:name="Table4.B7" style:family="table-cell">
      <style:table-cell-properties style:vertical-align="" fo:background-color="transparent" fo:padding-left="0.075in" fo:padding-right="0.075in" fo:padding-top="0in" fo:padding-bottom="0in" fo:border-left="none" fo:border-right="none" fo:border-top="none" fo:border-bottom="0.5pt solid #000000" style:writing-mode="lr-tb">
        <style:background-image/>
      </style:table-cell-properties>
    </style:style>
    <style:style style:name="Table4.D7" style:family="table-cell">
      <style:table-cell-properties style:vertical-align="" fo:background-color="transparent" fo:padding-left="0.075in" fo:padding-right="0.075in" fo:padding-top="0in" fo:padding-bottom="0in" fo:border-left="none" fo:border-right="0.5pt solid #000000" fo:border-top="none" fo:border-bottom="0.5pt solid #000000" style:writing-mode="lr-tb">
        <style:background-image/>
      </style:table-cell-properties>
    </style:style>
    <style:style style:name="Table5" style:family="table">
      <style:table-properties style:width="6in" fo:margin-left="-0.075in" fo:margin-top="0in" fo:margin-bottom="0in" fo:break-before="page" table:align="left" style:writing-mode="lr-tb"/>
    </style:style>
    <style:style style:name="Table5.A" style:family="table-column">
      <style:table-column-properties style:column-width="3in"/>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000000" style:writing-mode="lr-tb"/>
    </style:style>
    <style:style style:name="Table5.7" style:family="table-row">
      <style:table-row-properties style:min-row-height="0.0521in" fo:keep-together="auto"/>
    </style:style>
    <style:style style:name="Table3" style:family="table">
      <style:table-properties style:width="6.275in" fo:margin-left="-0.0785in" table:align="left" style:writing-mode="lr-tb"/>
    </style:style>
    <style:style style:name="Table3.A" style:family="table-column">
      <style:table-column-properties style:column-width="0.3785in"/>
    </style:style>
    <style:style style:name="Table3.B" style:family="table-column">
      <style:table-column-properties style:column-width="1.3514in"/>
    </style:style>
    <style:style style:name="Table3.C" style:family="table-column">
      <style:table-column-properties style:column-width="3.4972in"/>
    </style:style>
    <style:style style:name="Table3.D" style:family="table-column">
      <style:table-column-properties style:column-width="1.0479in"/>
    </style:style>
    <style:style style:name="Table3.A1" style:family="table-cell">
      <style:table-cell-properties style:vertical-align="middle" fo:padding="0.0194in" fo:border="none"/>
    </style:style>
    <style:style style:name="Table6" style:family="table">
      <style:table-properties style:width="3.5931in" table:align="left" style:writing-mode="lr-tb"/>
    </style:style>
    <style:style style:name="Table6.A" style:family="table-column">
      <style:table-column-properties style:column-width="1.8278in"/>
    </style:style>
    <style:style style:name="Table6.B" style:family="table-column">
      <style:table-column-properties style:column-width="1.7653in"/>
    </style:style>
    <style:style style:name="Table6.A1" style:family="table-cell">
      <style:table-cell-properties style:vertical-align="middle" fo:padding="0.0194in" fo:border="none"/>
    </style:style>
    <style:style style:name="Table7" style:family="table">
      <style:table-properties style:width="6in" fo:margin-left="-0.075in" fo:margin-top="0in" fo:margin-bottom="0in" table:align="left" style:writing-mode="lr-tb"/>
    </style:style>
    <style:style style:name="Table7.A" style:family="table-column">
      <style:table-column-properties style:column-width="1.2in"/>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0" style:writing-mode="lr-tb"/>
    </style:style>
    <style:style style:name="P1" style:family="paragraph" style:parent-style-name="normal" style:master-page-name="First_20_Page">
      <style:paragraph-properties fo:margin-top="0in" fo:margin-bottom="0.111in" style:contextual-spacing="false" fo:line-height="108%" fo:text-align="center" style:justify-single-word="false" style:page-number="1"/>
      <style:text-properties fo:font-size="14pt" fo:font-weight="bold" officeooo:paragraph-rsid="0021661c" style:font-size-asian="14pt" style:font-weight-asian="bold" style:font-size-complex="14pt" style:font-weight-complex="bold"/>
    </style:style>
    <style:style style:name="P2" style:family="paragraph" style:parent-style-name="normal">
      <style:paragraph-properties fo:margin-top="0in" fo:margin-bottom="0.111in" style:contextual-spacing="false" fo:line-height="108%" fo:text-align="center" style:justify-single-word="false"/>
      <style:text-properties officeooo:paragraph-rsid="0021661c"/>
    </style:style>
    <style:style style:name="P3" style:family="paragraph" style:parent-style-name="Standard" style:master-page-name="">
      <loext:graphic-properties draw:fill="none"/>
      <style:paragraph-properties fo:margin-left="0.3752in" fo:margin-right="0.5618in" fo:margin-top="0in" fo:margin-bottom="0.0835in" style:contextual-spacing="false" fo:line-height="150%" fo:text-align="center" style:justify-single-word="false" fo:orphans="2" fo:widows="2" fo:text-indent="0in" style:auto-text-indent="false" style:page-number="auto" fo:background-color="transparent" style:writing-mode="lr-tb"/>
      <style:text-properties fo:color="#000000" loext:opacity="100%" style:font-name="Times New Roman" fo:font-size="12pt" officeooo:paragraph-rsid="002b4914" style:font-size-asian="12pt" style:font-name-complex="Times New Roman1" style:font-size-complex="12pt" style:font-weight-complex="bold">
        <loext:char-complex-color loext:theme-type="dark1" loext:color-type="theme"/>
      </style:text-properties>
    </style:style>
    <style:style style:name="P4" style:family="paragraph" style:parent-style-name="Standard">
      <loext:graphic-properties draw:fill="none"/>
      <style:paragraph-properties fo:margin-left="0.3752in" fo:margin-right="0.5618in" fo:margin-top="0in" fo:margin-bottom="0.0835in" style:contextual-spacing="false" fo:line-height="150%" fo:text-align="center" style:justify-single-word="false" fo:orphans="2" fo:widows="2" fo:text-indent="0in" style:auto-text-indent="false" fo:background-color="transparent" style:writing-mode="lr-tb"/>
      <style:text-properties fo:font-size="12pt" officeooo:paragraph-rsid="002b4914" style:font-size-asian="12pt" style:font-size-complex="12pt"/>
    </style:style>
    <style:style style:name="P5" style:family="paragraph" style:parent-style-name="Standard">
      <loext:graphic-properties draw:fill="none"/>
      <style:paragraph-properties fo:margin-left="0.3752in" fo:margin-right="0.5618in" fo:margin-top="0in" fo:margin-bottom="0.0835in" style:contextual-spacing="false" fo:line-height="150%" fo:text-align="center" style:justify-single-word="false" fo:orphans="2" fo:widows="2" fo:text-indent="0in" style:auto-text-indent="false" fo:background-color="transparent" style:writing-mode="lr-tb">
        <style:tab-stops>
          <style:tab-stop style:position="3.1339in" style:type="center"/>
          <style:tab-stop style:position="6.2681in" style:type="right"/>
        </style:tab-stops>
      </style:paragraph-properties>
      <style:text-properties fo:color="#000000" loext:opacity="100%" style:font-name="Times New Roman" fo:font-size="13pt" officeooo:paragraph-rsid="002b4914" style:font-size-asian="13pt" style:font-name-complex="Times New Roman1" style:font-size-complex="13pt" style:font-weight-complex="bold">
        <loext:char-complex-color loext:theme-type="dark1" loext:color-type="theme"/>
      </style:text-properties>
    </style:style>
    <style:style style:name="P6" style:family="paragraph" style:parent-style-name="Standard">
      <style:paragraph-properties fo:line-height="150%" fo:text-align="center" style:justify-single-word="false"/>
      <style:text-properties fo:font-size="11pt" officeooo:paragraph-rsid="0022e267" style:font-size-asian="11pt" style:font-size-complex="11pt"/>
    </style:style>
    <style:style style:name="P7" style:family="paragraph" style:parent-style-name="normal">
      <style:paragraph-properties fo:line-height="150%" fo:text-align="center" style:justify-single-word="false"/>
      <style:text-properties officeooo:paragraph-rsid="0022e267"/>
    </style:style>
    <style:style style:name="P8" style:family="paragraph" style:parent-style-name="normal">
      <style:paragraph-properties fo:margin-left="2.5in" fo:line-height="150%" fo:text-indent="0in" style:auto-text-indent="false"/>
      <style:text-properties officeooo:paragraph-rsid="0021661c"/>
    </style:style>
    <style:style style:name="P9" style:family="paragraph" style:parent-style-name="normal" style:master-page-name="">
      <loext:graphic-properties draw:fill="none"/>
      <style:paragraph-properties fo:margin-left="0.3752in" fo:margin-right="0.1866in" fo:margin-top="0in" fo:margin-bottom="0in" style:contextual-spacing="false" fo:line-height="150%" fo:text-align="left" style:justify-single-word="false" fo:orphans="2" fo:widows="2" fo:text-indent="0in" style:auto-text-indent="false" style:page-number="auto" fo:background-color="transparent" style:writing-mode="lr-tb"/>
      <style:text-properties fo:font-weight="bold" officeooo:paragraph-rsid="0021661c" style:font-weight-asian="bold" style:font-weight-complex="bold"/>
    </style:style>
    <style:style style:name="P10" style:family="paragraph" style:parent-style-name="normal">
      <style:text-properties officeooo:paragraph-rsid="0021661c"/>
    </style:style>
    <style:style style:name="P11" style:family="paragraph" style:parent-style-name="normal" style:list-style-name="WWNum1">
      <style:paragraph-properties fo:margin-left="0in" fo:margin-top="0in" fo:margin-bottom="0.111in" style:contextual-spacing="false" fo:line-height="100%" fo:text-indent="0in" style:auto-text-indent="false"/>
      <style:text-properties officeooo:paragraph-rsid="0021661c"/>
    </style:style>
    <style:style style:name="P12" style:family="paragraph" style:parent-style-name="normal">
      <style:paragraph-properties fo:text-align="center" style:justify-single-word="false"/>
      <style:text-properties officeooo:paragraph-rsid="0021661c"/>
    </style:style>
    <style:style style:name="P13" style:family="paragraph" style:parent-style-name="normal" style:list-style-name="WWNum1">
      <loext:graphic-properties draw:fill="none"/>
      <style:paragraph-properties fo:margin-left="0in" fo:margin-right="0.0618in" fo:margin-top="0in" fo:margin-bottom="0.111in" style:contextual-spacing="false" fo:line-height="100%" fo:text-align="left" style:justify-single-word="false" fo:orphans="2" fo:widows="2" fo:text-indent="0in" style:auto-text-indent="false" fo:background-color="transparent" style:writing-mode="lr-tb"/>
      <style:text-properties officeooo:paragraph-rsid="0021661c"/>
    </style:style>
    <style:style style:name="P14" style:family="paragraph" style:parent-style-name="normal" style:list-style-name="WWNum1">
      <style:paragraph-properties fo:margin-left="0in" fo:margin-top="0in" fo:margin-bottom="0.111in" style:contextual-spacing="false" fo:line-height="100%" fo:text-indent="0in" style:auto-text-indent="false"/>
      <style:text-properties officeooo:rsid="002b4914" officeooo:paragraph-rsid="002b4914"/>
    </style:style>
    <style:style style:name="P15" style:family="paragraph" style:parent-style-name="Heading_20_1">
      <style:paragraph-properties fo:margin-top="0in" fo:margin-bottom="0in" style:contextual-spacing="false" fo:text-align="center" style:justify-single-word="false"/>
      <style:text-properties fo:color="#000000" loext:opacity="100%" style:font-name="Times New Roman" officeooo:paragraph-rsid="0029fd2a" style:font-name-asian="Times New Roman1"/>
    </style:style>
    <style:style style:name="P16" style:family="paragraph" style:parent-style-name="Heading_20_1" style:master-page-name="prefix">
      <style:paragraph-properties fo:margin-top="0in" fo:margin-bottom="0in" style:contextual-spacing="false" fo:text-align="center" style:justify-single-word="false" style:page-number="1"/>
      <style:text-properties fo:color="#000000" loext:opacity="100%" style:font-name="Times New Roman" officeooo:paragraph-rsid="0029fd2a" style:font-name-asian="Times New Roman1"/>
    </style:style>
    <style:style style:name="P17" style:family="paragraph" style:parent-style-name="Standard">
      <style:paragraph-properties fo:margin-top="0in" fo:margin-bottom="0.0835in" style:contextual-spacing="false" fo:line-height="150%" fo:text-align="justify" style:justify-single-word="false"/>
      <style:text-properties fo:color="#000000" loext:opacity="100%" style:font-name="Times New Roman" fo:font-size="12pt" fo:font-weight="normal" style:font-name-asian="Times New Roman1" style:font-size-asian="12pt" style:font-weight-asian="normal"/>
    </style:style>
    <style:style style:name="P18" style:family="paragraph" style:parent-style-name="Standard">
      <style:paragraph-properties fo:margin-top="0in" fo:margin-bottom="0in" style:contextual-spacing="false" fo:line-height="150%"/>
      <style:text-properties fo:font-size="12pt" officeooo:paragraph-rsid="0022e267" style:font-name-asian="NimbusRomNo9L-Regu" style:font-size-asian="12pt" style:font-name-complex="NimbusRomNo9L-Regu" style:font-size-complex="12pt"/>
    </style:style>
    <style:style style:name="P19" style:family="paragraph" style:parent-style-name="Standard">
      <style:paragraph-properties fo:margin-top="0in" fo:margin-bottom="0in" style:contextual-spacing="false" fo:line-height="150%"/>
      <style:text-properties officeooo:paragraph-rsid="0022e267"/>
    </style:style>
    <style:style style:name="P20" style:family="paragraph" style:parent-style-name="Standard">
      <style:paragraph-properties fo:margin-top="0in" fo:margin-bottom="0in" style:contextual-spacing="false" fo:line-height="150%" fo:text-align="center" style:justify-single-word="false"/>
      <style:text-properties officeooo:paragraph-rsid="0022e267"/>
    </style:style>
    <style:style style:name="P21" style:family="paragraph" style:parent-style-name="Standard">
      <style:paragraph-properties fo:line-height="150%" fo:text-align="center" style:justify-single-word="false"/>
      <style:text-properties style:font-name="Times New Roman" fo:font-size="10.5pt" officeooo:paragraph-rsid="0022e267" style:font-name-asian="NimbusRomNo9L-Regu" style:font-size-asian="10.5pt" style:font-name-complex="Times New Roman1" style:font-size-complex="10.5pt"/>
    </style:style>
    <style:style style:name="P22" style:family="paragraph" style:parent-style-name="Standard">
      <style:paragraph-properties fo:line-height="150%"/>
      <style:text-properties fo:color="#000000" loext:opacity="100%" style:font-name="Times New Roman" fo:font-size="12pt" officeooo:paragraph-rsid="0022e267" style:font-size-asian="12pt" style:font-name-complex="Times New Roman1" style:font-size-complex="12pt">
        <loext:char-complex-color loext:theme-type="dark1" loext:color-type="theme"/>
      </style:text-properties>
    </style:style>
    <style:style style:name="P23" style:family="paragraph" style:parent-style-name="Standard">
      <style:paragraph-properties fo:margin-top="0in" fo:margin-bottom="0.0835in" style:contextual-spacing="false" fo:orphans="2" fo:widows="2"/>
      <style:text-properties fo:color="#000000" loext:opacity="100%" style:font-name="Times New Roman" fo:font-size="12pt" fo:language="en" fo:country="US" officeooo:paragraph-rsid="0022e267" style:letter-kerning="false" style:font-size-asian="12pt" style:language-asian="en" style:country-asian="US" style:font-size-complex="11pt" style:language-complex="ar" style:country-complex="SA"/>
    </style:style>
    <style:style style:name="P24" style:family="paragraph" style:parent-style-name="Standard">
      <style:paragraph-properties fo:line-height="150%"/>
      <style:text-properties style:font-name="Times New Roman" fo:font-size="12pt" officeooo:paragraph-rsid="0022e267" style:font-name-asian="NimbusRomNo9L-Regu" style:font-size-asian="12pt" style:font-name-complex="Times New Roman1" style:font-size-complex="12pt"/>
    </style:style>
    <style:style style:name="P25" style:family="paragraph" style:parent-style-name="Standard">
      <style:paragraph-properties fo:line-height="150%" fo:text-align="center" style:justify-single-word="false"/>
      <style:text-properties style:font-name="Times New Roman" fo:font-size="12pt" officeooo:paragraph-rsid="0022e267" style:font-name-asian="NimbusRomNo9L-Regu" style:font-size-asian="12pt" style:font-name-complex="Times New Roman1" style:font-size-complex="12pt"/>
    </style:style>
    <style:style style:name="P26" style:family="paragraph" style:parent-style-name="Heading_20_1">
      <style:paragraph-properties fo:margin-left="0in" fo:line-height="150%" fo:text-align="center" style:justify-single-word="false" fo:text-indent="0in" style:auto-text-indent="false"/>
      <style:text-properties officeooo:paragraph-rsid="00246eb6"/>
    </style:style>
    <style:style style:name="P27" style:family="paragraph" style:parent-style-name="Heading_20_1">
      <style:paragraph-properties fo:margin-left="0in" fo:line-height="150%" fo:text-align="center" style:justify-single-word="false" fo:text-indent="0in" style:auto-text-indent="false" fo:break-before="page"/>
      <style:text-properties officeooo:paragraph-rsid="00246eb6"/>
    </style:style>
    <style:style style:name="P28" style:family="paragraph" style:parent-style-name="Standard">
      <style:paragraph-properties fo:margin-top="0in" fo:margin-bottom="0in" style:contextual-spacing="false" fo:line-height="150%" fo:text-align="justify" style:justify-single-word="false" loext:word-spacing-minimum="75%" loext:word-spacing-maximum="133%"/>
      <style:text-properties officeooo:paragraph-rsid="00246eb6"/>
    </style:style>
    <style:style style:name="P29" style:family="paragraph" style:parent-style-name="Standard">
      <style:paragraph-properties fo:margin-top="0in" fo:margin-bottom="0in" style:contextual-spacing="false" fo:line-height="150%" fo:text-align="justify" style:justify-single-word="false" loext:word-spacing-minimum="75%" loext:word-spacing-maximum="133%"/>
      <style:text-properties style:font-name="Times New Roman" fo:font-size="12pt" officeooo:paragraph-rsid="00246eb6" style:font-name-asian="NimbusRomNo9L-Regu" style:font-size-asian="12pt" style:font-name-complex="Times New Roman1" style:font-size-complex="12pt"/>
    </style:style>
    <style:style style:name="P30" style:family="paragraph" style:parent-style-name="Standard">
      <style:paragraph-properties fo:margin-top="0in" fo:margin-bottom="0in" style:contextual-spacing="false" fo:line-height="150%" fo:text-align="center" style:justify-single-word="false"/>
      <style:text-properties style:font-name="Times New Roman" fo:font-size="14pt" officeooo:paragraph-rsid="00246eb6" style:font-name-asian="NimbusRomNo9L-Regu" style:font-size-asian="14pt" style:font-name-complex="Times New Roman1" style:font-size-complex="14pt"/>
    </style:style>
    <style:style style:name="P31" style:family="paragraph" style:parent-style-name="Standard">
      <style:paragraph-properties fo:margin-top="0in" fo:margin-bottom="0.0835in" style:contextual-spacing="false" fo:line-height="150%" fo:text-align="center" style:justify-single-word="false"/>
      <style:text-properties fo:color="#000000" loext:opacity="100%" style:font-name="Times New Roman" fo:font-size="14pt" fo:font-weight="normal" officeooo:paragraph-rsid="00246eb6" style:font-name-asian="NimbusRomNo9L-Regu" style:font-size-asian="14pt" style:font-weight-asian="normal" style:font-name-complex="Times New Roman1" style:font-size-complex="14pt"/>
    </style:style>
    <style:style style:name="P32" style:family="paragraph" style:parent-style-name="Standard">
      <style:paragraph-properties fo:margin-top="0in" fo:margin-bottom="0in" style:contextual-spacing="false" fo:line-height="150%" fo:text-align="center" style:justify-single-word="false"/>
      <style:text-properties style:font-name="Times New Roman" fo:font-size="10pt" officeooo:paragraph-rsid="00246eb6" style:font-name-asian="NimbusRomNo9L-Regu" style:font-size-asian="10pt" style:font-name-complex="Times New Roman1" style:font-size-complex="10pt"/>
    </style:style>
    <style:style style:name="P33" style:family="paragraph" style:parent-style-name="Standard">
      <style:paragraph-properties fo:margin-top="0in" fo:margin-bottom="0in" style:contextual-spacing="false" fo:line-height="150%" fo:text-align="center" style:justify-single-word="false"/>
      <style:text-properties fo:font-size="14pt" officeooo:paragraph-rsid="00246eb6" style:font-size-asian="14pt" style:font-size-complex="14pt"/>
    </style:style>
    <style:style style:name="P34" style:family="paragraph" style:parent-style-name="Standard">
      <style:paragraph-properties fo:margin-top="0in" fo:margin-bottom="0in" style:contextual-spacing="false" fo:line-height="150%" fo:text-align="center" style:justify-single-word="false"/>
      <style:text-properties style:font-name="Times New Roman" fo:font-size="12pt" officeooo:paragraph-rsid="00246eb6" style:font-name-asian="NimbusRomNo9L-Regu" style:font-size-asian="12pt" style:font-name-complex="Times New Roman1" style:font-size-complex="12pt"/>
    </style:style>
    <style:style style:name="P35" style:family="paragraph" style:parent-style-name="Heading_20_1">
      <style:paragraph-properties fo:margin-top="0in" fo:margin-bottom="0in" style:contextual-spacing="false" fo:text-align="center" style:justify-single-word="false"/>
      <style:text-properties fo:color="#000000" loext:opacity="100%" officeooo:paragraph-rsid="00246eb6"/>
    </style:style>
    <style:style style:name="P36" style:family="paragraph" style:parent-style-name="Standard">
      <style:paragraph-properties fo:margin-top="0in" fo:margin-bottom="0in" style:contextual-spacing="false" fo:text-align="center" style:justify-single-word="false"/>
      <style:text-properties fo:color="#000000" loext:opacity="100%" style:font-name="Times New Roman" officeooo:paragraph-rsid="00246eb6" style:font-name-asian="Times New Roman1"/>
    </style:style>
    <style:style style:name="P37" style:family="paragraph" style:parent-style-name="Standard">
      <style:text-properties fo:color="#000000" loext:opacity="100%"/>
    </style:style>
    <style:style style:name="P38" style:family="paragraph" style:parent-style-name="Heading_20_1">
      <style:paragraph-properties fo:margin-top="0in" fo:margin-bottom="0in" style:contextual-spacing="false" fo:text-align="center" style:justify-single-word="false" fo:break-before="page"/>
      <style:text-properties fo:color="#000000" loext:opacity="100%" style:font-name="Times New Roman" style:font-name-asian="Times New Roman1"/>
    </style:style>
    <style:style style:name="P39" style:family="paragraph" style:parent-style-name="Standard">
      <style:paragraph-properties fo:margin-top="0in" fo:margin-bottom="0in" style:contextual-spacing="false" fo:text-align="center" style:justify-single-word="false"/>
      <style:text-properties fo:color="#000000" loext:opacity="100%" style:font-name="Times New Roman" style:font-name-asian="Times New Roman1"/>
    </style:style>
    <style:style style:name="P40" style:family="paragraph" style:parent-style-name="Standard">
      <style:paragraph-properties fo:margin-top="0in" fo:margin-bottom="0.0835in" style:contextual-spacing="false" fo:line-height="150%" fo:text-align="right" style:justify-single-word="false"/>
      <style:text-properties fo:color="#000000" loext:opacity="100%" style:font-name="Times New Roman" fo:font-size="12pt" fo:font-weight="normal" style:font-name-asian="Times New Roman1" style:font-size-asian="12pt" style:font-weight-asian="normal"/>
    </style:style>
    <style:style style:name="P41" style:family="paragraph" style:parent-style-name="Standard">
      <style:paragraph-properties fo:margin-left="0.5in" fo:margin-top="0in" fo:margin-bottom="0.0835in" style:contextual-spacing="false" fo:line-height="150%" fo:text-align="justify" style:justify-single-word="false" fo:text-indent="0in" style:auto-text-indent="false"/>
      <style:text-properties fo:color="#000000" loext:opacity="100%" style:font-name="Times New Roman" fo:font-size="12pt" fo:font-weight="normal" officeooo:paragraph-rsid="0024e099" style:font-name-asian="Times New Roman1" style:font-size-asian="12pt" style:font-weight-asian="normal"/>
    </style:style>
    <style:style style:name="P42" style:family="paragraph" style:parent-style-name="Standard">
      <style:paragraph-properties fo:margin-left="0.5in" fo:margin-top="0in" fo:margin-bottom="0.0835in" style:contextual-spacing="false" fo:line-height="150%" fo:text-align="justify" style:justify-single-word="false" fo:text-indent="0in" style:auto-text-indent="false"/>
      <style:text-properties fo:color="#000000" loext:opacity="100%" style:font-name="Times New Roman" fo:font-size="12pt" fo:font-weight="normal" officeooo:paragraph-rsid="002659ee" style:font-name-asian="Times New Roman1" style:font-size-asian="12pt" style:font-weight-asian="normal"/>
    </style:style>
    <style:style style:name="P43" style:family="paragraph" style:parent-style-name="Standard">
      <style:paragraph-properties fo:margin-top="0in" fo:margin-bottom="0.0835in" style:contextual-spacing="false" fo:line-height="150%" fo:text-align="right" style:justify-single-word="false"/>
      <style:text-properties fo:color="#000000" loext:opacity="100%" style:font-name="Times New Roman" fo:font-size="12pt" fo:font-weight="normal" officeooo:paragraph-rsid="00343fbe" style:font-name-asian="Times New Roman1" style:font-size-asian="12pt" style:font-weight-asian="normal"/>
    </style:style>
    <style:style style:name="P44" style:family="paragraph" style:parent-style-name="Standard">
      <style:paragraph-properties fo:margin-top="0in" fo:margin-bottom="0.0835in" style:contextual-spacing="false" fo:line-height="150%" fo:text-align="justify" style:justify-single-word="false"/>
      <style:text-properties fo:color="#000000" loext:opacity="100%" style:font-name="Times New Roman" fo:font-size="12pt" fo:font-weight="normal" fo:background-color="#ffff00" style:font-name-asian="Times New Roman1" style:font-size-asian="12pt" style:font-weight-asian="normal"/>
    </style:style>
    <style:style style:name="P45" style:family="paragraph" style:parent-style-name="Contents_20_1">
      <style:paragraph-properties>
        <style:tab-stops>
          <style:tab-stop style:position="6.0173in" style:type="right" style:leader-style="dotted" style:leader-text="."/>
        </style:tab-stops>
      </style:paragraph-properties>
    </style:style>
    <style:style style:name="P46" style:family="paragraph" style:parent-style-name="Contents_20_2">
      <style:paragraph-properties>
        <style:tab-stops>
          <style:tab-stop style:position="6.0173in" style:type="right" style:leader-style="dotted" style:leader-text="."/>
        </style:tab-stops>
      </style:paragraph-properties>
    </style:style>
    <style:style style:name="P47" style:family="paragraph" style:parent-style-name="Contents_20_3">
      <style:paragraph-properties>
        <style:tab-stops>
          <style:tab-stop style:position="6.0173in" style:type="right" style:leader-style="dotted" style:leader-text="."/>
        </style:tab-stops>
      </style:paragraph-properties>
    </style:style>
    <style:style style:name="P48" style:family="paragraph" style:parent-style-name="Contents_20_4">
      <style:paragraph-properties>
        <style:tab-stops>
          <style:tab-stop style:position="6.0173in" style:type="right" style:leader-style="dotted" style:leader-text="."/>
        </style:tab-stops>
      </style:paragraph-properties>
    </style:style>
    <style:style style:name="P49" style:family="paragraph" style:parent-style-name="Standard">
      <style:paragraph-properties fo:margin-top="0in" fo:margin-bottom="0.0835in" style:contextual-spacing="false" fo:line-height="150%" fo:text-align="justify" style:justify-single-word="false"/>
      <style:text-properties fo:color="#000000" loext:opacity="100%" style:font-name="Times New Roman" fo:font-size="12pt" fo:font-weight="normal" officeooo:rsid="00304d7c" officeooo:paragraph-rsid="00304d7c" style:font-name-asian="Times New Roman1" style:font-size-asian="12pt" style:font-weight-asian="normal"/>
    </style:style>
    <style:style style:name="P50" style:family="paragraph" style:parent-style-name="Standard">
      <style:paragraph-properties fo:margin-top="0in" fo:margin-bottom="0.0835in" style:contextual-spacing="false" fo:line-height="150%" fo:text-align="justify" style:justify-single-word="false"/>
      <style:text-properties fo:color="#000000" loext:opacity="100%" style:font-name="Times New Roman" fo:font-size="12pt" fo:font-weight="normal" officeooo:paragraph-rsid="002aa5d9" style:font-name-asian="Times New Roman1" style:font-size-asian="12pt" style:font-weight-asian="normal"/>
    </style:style>
    <style:style style:name="P51" style:family="paragraph" style:parent-style-name="Heading_20_1" style:master-page-name="Standard">
      <style:paragraph-properties fo:margin-top="0in" fo:margin-bottom="0in" style:contextual-spacing="false" fo:text-align="center" style:justify-single-word="false" style:page-number="1" fo:break-before="page"/>
      <style:text-properties fo:color="#000000" loext:opacity="100%" style:font-name="Times New Roman" officeooo:paragraph-rsid="002b920d" style:font-name-asian="Times New Roman1"/>
    </style:style>
    <style:style style:name="P52" style:family="paragraph" style:parent-style-name="Heading_20_2">
      <style:text-properties fo:color="#000000" loext:opacity="100%" style:font-name="Times New Roman" style:font-name-asian="Times New Roman1"/>
    </style:style>
    <style:style style:name="P53" style:family="paragraph" style:parent-style-name="Heading_20_3">
      <style:text-properties fo:color="#000000" loext:opacity="100%" style:font-name="Times New Roman" style:font-name-asian="Times New Roman1"/>
    </style:style>
    <style:style style:name="P54" style:family="paragraph" style:parent-style-name="Standard">
      <style:paragraph-properties fo:margin-top="0in" fo:margin-bottom="0.0835in" style:contextual-spacing="false" fo:line-height="150%" fo:text-align="justify" style:justify-single-word="false"/>
      <style:text-properties fo:color="#000000" loext:opacity="100%" style:font-name="Times New Roman" fo:font-size="12pt" fo:font-weight="normal" officeooo:paragraph-rsid="002b920d" style:font-name-asian="Times New Roman1" style:font-size-asian="12pt" style:font-weight-asian="normal"/>
    </style:style>
    <style:style style:name="P55" style:family="paragraph" style:parent-style-name="Heading_20_3">
      <style:paragraph-properties fo:line-height="200%"/>
      <style:text-properties fo:color="#000000" loext:opacity="100%" style:font-name="Times New Roman" officeooo:paragraph-rsid="002b920d" style:font-name-asian="Times New Roman1"/>
    </style:style>
    <style:style style:name="P56" style:family="paragraph" style:parent-style-name="Standard" style:list-style-name="L1">
      <style:paragraph-properties fo:margin-top="0in" fo:margin-bottom="0.0835in" style:contextual-spacing="false" fo:line-height="150%" fo:text-align="justify" style:justify-single-word="false"/>
      <style:text-properties fo:color="#000000" loext:opacity="100%" style:font-name="Times New Roman" fo:font-size="12pt" fo:font-weight="normal" fo:background-color="#ffa6a6" style:font-name-asian="Times New Roman1" style:font-size-asian="12pt" style:font-weight-asian="normal"/>
    </style:style>
    <style:style style:name="P57" style:family="paragraph" style:parent-style-name="Standard" style:list-style-name="L1">
      <style:paragraph-properties fo:margin-top="0in" fo:margin-bottom="0.0835in" style:contextual-spacing="false" fo:line-height="150%" fo:text-align="justify" style:justify-single-word="false"/>
      <style:text-properties fo:color="#000000" loext:opacity="100%" style:font-name="Times New Roman" fo:font-size="12pt" fo:font-weight="normal" officeooo:paragraph-rsid="002b920d" fo:background-color="#ffa6a6" style:font-name-asian="Times New Roman1" style:font-size-asian="12pt" style:font-weight-asian="normal"/>
    </style:style>
    <style:style style:name="P58" style:family="paragraph" style:parent-style-name="Heading_20_3">
      <style:paragraph-properties fo:break-before="page"/>
      <style:text-properties fo:color="#000000" loext:opacity="100%" style:font-name="Times New Roman" style:font-name-asian="Times New Roman1"/>
    </style:style>
    <style:style style:name="P59" style:family="paragraph" style:parent-style-name="Standard">
      <style:paragraph-properties fo:text-align="center" style:justify-single-word="false"/>
      <style:text-properties fo:color="#000000" loext:opacity="100%" officeooo:paragraph-rsid="00304d7c"/>
    </style:style>
    <style:style style:name="P60" style:family="paragraph" style:parent-style-name="Standard">
      <style:text-properties fo:color="#000000" loext:opacity="100%" fo:font-weight="bold" officeooo:rsid="00304d7c" officeooo:paragraph-rsid="00304d7c" style:font-weight-asian="bold" style:font-weight-complex="bold"/>
    </style:style>
    <style:style style:name="P61" style:family="paragraph" style:parent-style-name="Standard">
      <style:text-properties officeooo:paragraph-rsid="00304d7c"/>
    </style:style>
    <style:style style:name="P62" style:family="paragraph" style:parent-style-name="Standard">
      <style:paragraph-properties fo:margin-top="0in" fo:margin-bottom="0.0835in" style:contextual-spacing="false" fo:line-height="150%" fo:text-align="justify" style:justify-single-word="false"/>
      <style:text-properties officeooo:paragraph-rsid="0030f075"/>
    </style:style>
    <style:style style:name="P63" style:family="paragraph" style:parent-style-name="Heading_20_2">
      <style:paragraph-properties fo:line-height="200%"/>
      <style:text-properties fo:color="#000000" loext:opacity="100%" style:font-name="Times New Roman" officeooo:paragraph-rsid="002cb8bc" style:font-name-asian="Times New Roman1"/>
    </style:style>
    <style:style style:name="P64" style:family="paragraph" style:parent-style-name="Standard">
      <style:paragraph-properties fo:margin-top="0in" fo:margin-bottom="0.0835in" style:contextual-spacing="false" fo:line-height="200%" fo:text-align="justify" style:justify-single-word="false"/>
      <style:text-properties fo:color="#000000" loext:opacity="100%" style:font-name="Times New Roman" fo:font-size="12pt" fo:font-weight="normal" style:font-name-asian="Times New Roman1" style:font-size-asian="12pt" style:font-weight-asian="normal"/>
    </style:style>
    <style:style style:name="P65" style:family="paragraph" style:parent-style-name="Standard">
      <style:paragraph-properties fo:margin-top="0in" fo:margin-bottom="0.0835in" style:contextual-spacing="false" fo:line-height="115%" fo:text-align="justify" style:justify-single-word="false"/>
      <style:text-properties fo:color="#000000" loext:opacity="100%" style:font-name="Times New Roman" fo:font-size="12pt" fo:font-weight="normal" style:font-name-asian="Times New Roman1" style:font-size-asian="12pt" style:font-weight-asian="normal"/>
    </style:style>
    <style:style style:name="P66" style:family="paragraph" style:parent-style-name="Heading_20_2">
      <style:paragraph-properties fo:line-height="200%"/>
      <style:text-properties fo:color="#000000" loext:opacity="100%" style:font-name="Times New Roman" style:font-name-asian="Times New Roman1"/>
    </style:style>
    <style:style style:name="P67" style:family="paragraph" style:parent-style-name="Heading_20_2">
      <style:paragraph-properties fo:line-height="200%" fo:break-before="page"/>
      <style:text-properties fo:color="#000000" loext:opacity="100%" style:font-name="Times New Roman" style:font-name-asian="Times New Roman1"/>
    </style:style>
    <style:style style:name="P68" style:family="paragraph" style:parent-style-name="Standard" style:list-style-name="L2">
      <style:paragraph-properties fo:margin-top="0in" fo:margin-bottom="0.0835in" style:contextual-spacing="false" fo:line-height="115%" fo:text-align="justify" style:justify-single-word="false"/>
      <style:text-properties fo:color="#000000" loext:opacity="100%" style:font-name="Times New Roman" fo:font-size="12pt" fo:font-weight="normal" style:font-name-asian="Times New Roman1" style:font-size-asian="12pt" style:font-weight-asian="normal"/>
    </style:style>
    <style:style style:name="P69" style:family="paragraph" style:parent-style-name="Standard" style:list-style-name="L3">
      <style:paragraph-properties fo:margin-top="0in" fo:margin-bottom="0.0835in" style:contextual-spacing="false" fo:line-height="200%" fo:text-align="justify" style:justify-single-word="false"/>
      <style:text-properties fo:color="#000000" loext:opacity="100%" style:font-name="Times New Roman" fo:font-size="12pt" fo:font-weight="normal" officeooo:paragraph-rsid="0030f075" style:font-name-asian="Times New Roman1" style:font-size-asian="12pt" style:font-weight-asian="normal"/>
    </style:style>
    <style:style style:name="P70" style:family="paragraph" style:parent-style-name="Standard">
      <style:paragraph-properties fo:margin-top="0in" fo:margin-bottom="0.0835in" style:contextual-spacing="false" fo:line-height="150%" fo:text-align="justify" style:justify-single-word="false"/>
      <style:text-properties fo:color="#000000" loext:opacity="100%" style:font-name="Times New Roman" fo:font-size="12pt" fo:font-weight="normal" officeooo:paragraph-rsid="002ccc9c" style:font-name-asian="Times New Roman1" style:font-size-asian="12pt" style:font-weight-asian="normal"/>
    </style:style>
    <style:style style:name="P71" style:family="paragraph" style:parent-style-name="Text_20_body">
      <style:text-properties fo:color="#000000" loext:opacity="100%" style:font-name="Times New Roman" fo:font-size="12pt" fo:font-weight="normal" officeooo:paragraph-rsid="0041fc3d" fo:background-color="#ffa6a6" style:font-name-asian="Times New Roman1" style:font-size-asian="12pt" style:font-weight-asian="normal"/>
    </style:style>
    <style:style style:name="P72" style:family="paragraph" style:parent-style-name="Text_20_body">
      <style:text-properties fo:color="#000000" loext:opacity="100%" fo:background-color="transparent"/>
    </style:style>
    <style:style style:name="P73" style:family="paragraph" style:parent-style-name="Text_20_body">
      <style:text-properties fo:color="#000000" loext:opacity="100%" fo:background-color="#ffa6a6"/>
    </style:style>
    <style:style style:name="P74" style:family="paragraph" style:parent-style-name="Text_20_body">
      <style:text-properties fo:color="#000000" loext:opacity="100%" officeooo:paragraph-rsid="0041fc3d" fo:background-color="#ffa6a6"/>
    </style:style>
    <style:style style:name="P75" style:family="paragraph" style:parent-style-name="Text_20_body">
      <style:paragraph-properties fo:break-before="page"/>
      <style:text-properties fo:color="#000000" loext:opacity="100%" officeooo:paragraph-rsid="0041fc3d" fo:background-color="#ffa6a6"/>
    </style:style>
    <style:style style:name="P76" style:family="paragraph" style:parent-style-name="Text_20_body">
      <style:text-properties fo:color="#000000" loext:opacity="100%" officeooo:paragraph-rsid="0041fc3d" fo:background-color="transparent"/>
    </style:style>
    <style:style style:name="P77" style:family="paragraph" style:parent-style-name="Standard">
      <style:text-properties fo:color="#000000" loext:opacity="100%" style:font-name="Times New Roman" fo:font-size="12pt" fo:font-weight="normal" fo:background-color="#ffa6a6" style:font-name-asian="Times New Roman1" style:font-size-asian="12pt" style:font-weight-asian="normal"/>
    </style:style>
    <style:style style:name="P78" style:family="paragraph" style:parent-style-name="Text_20_body" style:list-style-name="L4">
      <style:paragraph-properties fo:margin-top="0in" fo:margin-bottom="0.0835in" style:contextual-spacing="false" fo:line-height="200%" fo:text-align="justify" style:justify-single-word="false"/>
      <style:text-properties fo:color="#000000" loext:opacity="100%" officeooo:paragraph-rsid="00447220"/>
    </style:style>
    <style:style style:name="P79" style:family="paragraph" style:parent-style-name="Text_20_body" style:list-style-name="L4">
      <style:paragraph-properties fo:margin-top="0in" fo:margin-bottom="0in" style:contextual-spacing="false" fo:line-height="200%"/>
      <style:text-properties fo:color="#000000" loext:opacity="100%" style:font-name="Times New Roman" fo:font-size="12pt" officeooo:paragraph-rsid="00447220" style:font-name-asian="Times New Roman1" style:font-size-asian="12pt"/>
    </style:style>
    <style:style style:name="P80" style:family="paragraph" style:parent-style-name="Text_20_body" style:list-style-name="L4">
      <style:paragraph-properties fo:margin-top="0in" fo:margin-bottom="0in" style:contextual-spacing="false" fo:line-height="200%"/>
      <style:text-properties fo:color="#000000" loext:opacity="100%" officeooo:paragraph-rsid="00447220"/>
    </style:style>
    <style:style style:name="P81" style:family="paragraph" style:parent-style-name="Standard">
      <style:paragraph-properties fo:margin-top="0in" fo:margin-bottom="0.0835in" style:contextual-spacing="false" fo:line-height="150%" fo:text-align="justify" style:justify-single-word="false"/>
      <style:text-properties fo:color="#000000" loext:opacity="100%" style:font-name="Times New Roman" style:font-name-asian="Times New Roman1"/>
    </style:style>
    <style:style style:name="P82" style:family="paragraph" style:parent-style-name="Standard">
      <style:paragraph-properties fo:margin-top="0in" fo:margin-bottom="0.0835in" style:contextual-spacing="false" fo:line-height="150%" fo:text-align="justify" style:justify-single-word="false"/>
      <style:text-properties officeooo:paragraph-rsid="003366c0"/>
    </style:style>
    <style:style style:name="P83" style:family="paragraph" style:parent-style-name="Standard">
      <style:paragraph-properties fo:margin-top="0in" fo:margin-bottom="0.0835in" style:contextual-spacing="false" fo:line-height="150%" fo:text-align="justify" style:justify-single-word="false"/>
      <style:text-properties fo:color="#000000" loext:opacity="100%" style:font-name="Times New Roman" fo:font-size="12pt" fo:font-weight="normal" officeooo:paragraph-rsid="004ef91a" style:font-name-asian="Times New Roman1" style:font-size-asian="12pt" style:font-weight-asian="normal"/>
    </style:style>
    <style:style style:name="P84" style:family="paragraph" style:parent-style-name="Heading_20_2">
      <style:paragraph-properties fo:break-before="page"/>
      <style:text-properties fo:color="#000000" loext:opacity="100%" style:font-name="Times New Roman" style:font-name-asian="Times New Roman1"/>
    </style:style>
    <style:style style:name="P85" style:family="paragraph" style:parent-style-name="Standard">
      <style:paragraph-properties fo:text-align="left" style:justify-single-word="false"/>
      <style:text-properties fo:color="#000000" loext:opacity="100%" style:font-name="Times New Roman" fo:font-size="12pt" fo:font-weight="bold" style:font-size-asian="12pt" style:font-weight-asian="bold"/>
    </style:style>
    <style:style style:name="P86" style:family="paragraph" style:parent-style-name="Standard">
      <style:paragraph-properties fo:margin-top="0in" fo:margin-bottom="0.0835in" style:contextual-spacing="false" fo:line-height="100%" fo:orphans="2" fo:widows="2"/>
      <style:text-properties fo:color="#000000" loext:opacity="100%" style:font-name="Times New Roman" fo:font-size="12pt" fo:language="en" fo:country="US" fo:font-weight="bold" officeooo:paragraph-rsid="0035b1aa" style:letter-kerning="false" style:font-size-asian="12pt" style:language-asian="en" style:country-asian="US" style:font-weight-asian="bold" style:font-size-complex="11pt" style:language-complex="ar" style:country-complex="SA"/>
    </style:style>
    <style:style style:name="P87" style:family="paragraph" style:parent-style-name="Standard">
      <style:paragraph-properties fo:line-height="100%"/>
      <style:text-properties fo:color="#000000" loext:opacity="100%" fo:language="en" fo:country="US" fo:font-weight="bold" officeooo:paragraph-rsid="0035b1aa" style:letter-kerning="false" style:language-asian="en" style:country-asian="US" style:font-weight-asian="bold" style:font-size-complex="11pt" style:language-complex="ar" style:country-complex="SA"/>
    </style:style>
    <style:style style:name="P88" style:family="paragraph" style:parent-style-name="Standard">
      <style:paragraph-properties fo:line-height="100%" fo:text-align="left" style:justify-single-word="false"/>
      <style:text-properties fo:color="#000000" loext:opacity="100%" fo:font-size="14pt" fo:language="en" fo:country="US" style:letter-kerning="false" style:font-size-asian="14pt" style:language-asian="en" style:country-asian="US" style:font-size-complex="14pt" style:language-complex="ar" style:country-complex="SA"/>
    </style:style>
    <style:style style:name="P89" style:family="paragraph" style:parent-style-name="Standard">
      <style:paragraph-properties fo:line-height="100%" fo:text-align="left" style:justify-single-word="false"/>
      <style:text-properties fo:color="#000000" loext:opacity="100%" fo:font-size="12pt" fo:language="en" fo:country="US" style:letter-kerning="false" style:font-size-asian="12pt" style:language-asian="en" style:country-asian="US" style:font-size-complex="12pt" style:language-complex="ar" style:country-complex="SA"/>
    </style:style>
    <style:style style:name="P90" style:family="paragraph" style:parent-style-name="Standard">
      <style:paragraph-properties fo:text-align="center" style:justify-single-word="false"/>
      <style:text-properties fo:color="#000000" loext:opacity="100%" fo:font-style="italic" fo:font-weight="normal" officeooo:rsid="00489c5a" officeooo:paragraph-rsid="00489c5a" style:font-style-asian="italic" style:font-weight-asian="normal" style:font-style-complex="italic" style:font-weight-complex="normal"/>
    </style:style>
    <style:style style:name="P91" style:family="paragraph" style:parent-style-name="Standard">
      <style:paragraph-properties fo:margin-top="0in" fo:margin-bottom="0.0835in" style:contextual-spacing="false" fo:line-height="150%" fo:text-align="justify" style:justify-single-word="false"/>
      <style:text-properties fo:color="#000000" loext:opacity="100%" style:font-name="Times New Roman" fo:font-size="12pt" fo:font-weight="normal" officeooo:paragraph-rsid="003b592a" style:font-name-asian="Times New Roman1" style:font-size-asian="12pt" style:font-weight-asian="normal"/>
    </style:style>
    <style:style style:name="P92" style:family="paragraph" style:parent-style-name="Heading_20_2">
      <style:text-properties fo:color="#000000" loext:opacity="100%" style:font-name="Times New Roman" officeooo:paragraph-rsid="003b592a" style:font-name-asian="Times New Roman1"/>
    </style:style>
    <style:style style:name="P93" style:family="paragraph" style:parent-style-name="Standard">
      <style:paragraph-properties fo:margin-top="0in" fo:margin-bottom="0.0835in" style:contextual-spacing="false" fo:line-height="150%" fo:text-align="justify" style:justify-single-word="false"/>
      <style:text-properties fo:color="#000000" loext:opacity="100%" style:font-name="Times New Roman" fo:font-size="12pt" fo:font-weight="normal" officeooo:paragraph-rsid="003906d9" style:font-name-asian="Times New Roman1" style:font-size-asian="12pt" style:font-weight-asian="normal"/>
    </style:style>
    <style:style style:name="P94" style:family="paragraph" style:parent-style-name="Standard" style:list-style-name="L5">
      <style:paragraph-properties fo:margin-top="0in" fo:margin-bottom="0.0835in" style:contextual-spacing="false" fo:line-height="150%" fo:text-align="justify" style:justify-single-word="false"/>
      <style:text-properties fo:color="#000000" loext:opacity="100%" style:font-name="Times New Roman" fo:font-size="12pt" fo:font-weight="normal" officeooo:paragraph-rsid="003906d9" style:font-name-asian="Times New Roman1" style:font-size-asian="12pt" style:font-weight-asian="normal"/>
    </style:style>
    <style:style style:name="P95" style:family="paragraph" style:parent-style-name="Standard">
      <style:paragraph-properties fo:margin-top="0in" fo:margin-bottom="0.0835in" style:contextual-spacing="false" fo:line-height="150%" fo:text-align="justify" style:justify-single-word="false"/>
      <style:text-properties fo:color="#000000" loext:opacity="100%" style:font-name="Times New Roman" fo:font-size="12pt" fo:font-weight="normal" officeooo:paragraph-rsid="003a4ea5" style:font-name-asian="Times New Roman1" style:font-size-asian="12pt" style:font-weight-asian="normal"/>
    </style:style>
    <style:style style:name="P96" style:family="paragraph" style:parent-style-name="Standard" style:list-style-name="L6">
      <style:text-properties fo:color="#000000" loext:opacity="100%" fo:font-weight="normal" officeooo:paragraph-rsid="003a4ea5" style:font-weight-asian="normal"/>
    </style:style>
    <style:style style:name="P97" style:family="paragraph" style:parent-style-name="Heading_20_4">
      <style:text-properties fo:color="#000000" loext:opacity="100%"/>
    </style:style>
    <style:style style:name="P98" style:family="paragraph" style:parent-style-name="Text_20_body">
      <style:paragraph-properties fo:margin-top="0in" fo:margin-bottom="0.0835in" style:contextual-spacing="false" fo:line-height="150%" fo:text-align="justify" style:justify-single-word="false"/>
      <style:text-properties fo:color="#000000" loext:opacity="100%" officeooo:paragraph-rsid="003db763"/>
    </style:style>
    <style:style style:name="P99" style:family="paragraph" style:parent-style-name="Text_20_body" style:list-style-name="L7">
      <style:paragraph-properties fo:margin-top="0in" fo:margin-bottom="0in" style:contextual-spacing="false"/>
      <style:text-properties fo:color="#000000" loext:opacity="100%"/>
    </style:style>
    <style:style style:name="P100" style:family="paragraph" style:parent-style-name="Text_20_body" style:list-style-name="L7">
      <style:paragraph-properties fo:margin-top="0in" fo:margin-bottom="0in" style:contextual-spacing="false"/>
      <style:text-properties fo:color="#000000" loext:opacity="100%" fo:font-weight="normal" style:font-weight-asian="normal" style:font-weight-complex="normal"/>
    </style:style>
    <style:style style:name="P101" style:family="paragraph" style:parent-style-name="Text_20_body" style:list-style-name="L7">
      <style:text-properties fo:color="#000000" loext:opacity="100%"/>
    </style:style>
    <style:style style:name="P102" style:family="paragraph" style:parent-style-name="Text_20_body">
      <style:paragraph-properties fo:margin-top="0in" fo:margin-bottom="0.0835in" style:contextual-spacing="false" fo:line-height="150%" fo:text-align="justify" style:justify-single-word="false"/>
      <style:text-properties fo:color="#000000" loext:opacity="100%"/>
    </style:style>
    <style:style style:name="P103" style:family="paragraph" style:parent-style-name="Text_20_body">
      <style:paragraph-properties fo:margin-top="0in" fo:margin-bottom="0.0835in" style:contextual-spacing="false" fo:line-height="150%" fo:text-align="justify" style:justify-single-word="false"/>
      <style:text-properties fo:color="#000000" loext:opacity="100%" style:font-name="Times New Roman" fo:font-size="12pt" fo:font-weight="normal" style:font-name-asian="Times New Roman1" style:font-size-asian="12pt" style:font-weight-asian="normal"/>
    </style:style>
    <style:style style:name="P104" style:family="paragraph" style:parent-style-name="Heading_20_4">
      <style:text-properties fo:color="#000000" loext:opacity="100%" style:font-name="Times New Roman" style:font-name-asian="Times New Roman1"/>
    </style:style>
    <style:style style:name="P105" style:family="paragraph" style:parent-style-name="Heading_20_4">
      <style:paragraph-properties fo:break-before="page"/>
      <style:text-properties fo:color="#000000" loext:opacity="100%" style:font-name="Times New Roman" style:font-name-asian="Times New Roman1"/>
    </style:style>
    <style:style style:name="P106" style:family="paragraph" style:parent-style-name="Text_20_body">
      <style:paragraph-properties fo:margin-top="0in" fo:margin-bottom="0.0835in" style:contextual-spacing="false" fo:line-height="150%" fo:text-align="justify" style:justify-single-word="false"/>
      <style:text-properties fo:color="#000000" loext:opacity="100%" style:font-name="Times New Roman" fo:font-size="12pt" fo:font-weight="normal" officeooo:paragraph-rsid="003e0379" style:font-name-asian="Times New Roman1" style:font-size-asian="12pt" style:font-weight-asian="normal"/>
    </style:style>
    <style:style style:name="P107" style:family="paragraph" style:parent-style-name="Text_20_body" style:list-style-name="L8">
      <style:paragraph-properties fo:margin-top="0in" fo:margin-bottom="0in" style:contextual-spacing="false"/>
      <style:text-properties fo:color="#000000" loext:opacity="100%"/>
    </style:style>
    <style:style style:name="P108" style:family="paragraph" style:parent-style-name="Text_20_body" style:list-style-name="L8">
      <style:paragraph-properties fo:margin-top="0in" fo:margin-bottom="0in" style:contextual-spacing="false"/>
      <style:text-properties fo:color="#000000" loext:opacity="100%" fo:font-weight="normal" style:font-weight-asian="normal" style:font-weight-complex="normal"/>
    </style:style>
    <style:style style:name="P109" style:family="paragraph" style:parent-style-name="Text_20_body" style:list-style-name="L8">
      <style:paragraph-properties fo:margin-top="0in" fo:margin-bottom="0in" style:contextual-spacing="false" fo:line-height="150%" fo:text-align="justify" style:justify-single-word="false" fo:orphans="2" fo:widows="2" style:writing-mode="lr-tb"/>
    </style:style>
    <style:style style:name="P110" style:family="paragraph" style:parent-style-name="Text_20_body" style:list-style-name="L8">
      <style:paragraph-properties fo:margin-top="0in" fo:margin-bottom="0in" style:contextual-spacing="false" fo:line-height="150%" fo:text-align="justify" style:justify-single-word="false" fo:orphans="2" fo:widows="2" style:writing-mode="lr-tb"/>
      <style:text-properties officeooo:paragraph-rsid="00447220"/>
    </style:style>
    <style:style style:name="P111" style:family="paragraph" style:parent-style-name="Text_20_body" style:list-style-name="L8">
      <style:paragraph-properties fo:margin-top="0in" fo:margin-bottom="0in" style:contextual-spacing="false" fo:line-height="150%" fo:text-align="justify" style:justify-single-word="false" fo:orphans="2" fo:widows="2" style:writing-mode="lr-tb"/>
      <style:text-properties fo:color="#000000" loext:opacity="100%" style:font-name="Times New Roman" fo:font-size="12pt" fo:font-weight="normal" officeooo:paragraph-rsid="00447220" style:font-name-asian="Times New Roman1" style:font-size-asian="12pt" style:font-weight-asian="normal" style:font-weight-complex="normal"/>
    </style:style>
    <style:style style:name="P112" style:family="paragraph" style:parent-style-name="Heading_20_4">
      <style:paragraph-properties fo:break-before="page"/>
      <style:text-properties fo:color="#000000" loext:opacity="100%" style:font-name="Times New Roman" officeooo:paragraph-rsid="00447220" style:font-name-asian="Times New Roman1"/>
    </style:style>
    <style:style style:name="P113" style:family="paragraph" style:parent-style-name="Text_20_body">
      <style:text-properties fo:color="#000000" loext:opacity="100%"/>
    </style:style>
    <style:style style:name="P114" style:family="paragraph" style:parent-style-name="Text_20_body" style:list-style-name="L9">
      <style:paragraph-properties fo:margin-top="0in" fo:margin-bottom="0in" style:contextual-spacing="false"/>
      <style:text-properties fo:color="#000000" loext:opacity="100%"/>
    </style:style>
    <style:style style:name="P115" style:family="paragraph" style:parent-style-name="Text_20_body" style:list-style-name="L9">
      <style:paragraph-properties fo:margin-top="0in" fo:margin-bottom="0in" style:contextual-spacing="false"/>
      <style:text-properties fo:color="#000000" loext:opacity="100%" fo:font-weight="normal" style:font-weight-asian="normal" style:font-weight-complex="normal"/>
    </style:style>
    <style:style style:name="P116" style:family="paragraph" style:parent-style-name="Text_20_body" style:list-style-name="L9">
      <style:text-properties fo:color="#000000" loext:opacity="100%"/>
    </style:style>
    <style:style style:name="P117" style:family="paragraph" style:parent-style-name="Heading_20_3">
      <style:text-properties fo:color="#000000" loext:opacity="100%" style:font-name="Times New Roman" fo:font-size="12pt" fo:font-weight="normal" officeooo:rsid="003f5e35" officeooo:paragraph-rsid="003f5e35" style:font-name-asian="Times New Roman1" style:font-size-asian="12pt" style:font-weight-asian="normal"/>
    </style:style>
    <style:style style:name="P118" style:family="paragraph" style:parent-style-name="Standard">
      <style:text-properties fo:color="#000000" loext:opacity="100%" fo:font-weight="normal" style:font-weight-asian="normal"/>
    </style:style>
    <style:style style:name="P119" style:family="paragraph" style:parent-style-name="Standard" style:list-style-name="L10"/>
    <style:style style:name="P120" style:family="paragraph" style:parent-style-name="Text_20_body" style:list-style-name="L11">
      <style:text-properties fo:color="#000000" loext:opacity="100%"/>
    </style:style>
    <style:style style:name="P121" style:family="paragraph" style:parent-style-name="Text_20_body" style:list-style-name="L11">
      <style:paragraph-properties style:writing-mode="lr-tb"/>
      <style:text-properties fo:color="#000000" loext:opacity="100%"/>
    </style:style>
    <style:style style:name="P122" style:family="paragraph" style:parent-style-name="Text_20_body" style:list-style-name="L11">
      <style:text-properties fo:color="#000000" loext:opacity="100%" officeooo:paragraph-rsid="0046fb96"/>
    </style:style>
    <style:style style:name="P123" style:family="paragraph" style:parent-style-name="Text_20_body" style:list-style-name="L11">
      <style:text-properties fo:color="#000000" loext:opacity="100%" officeooo:paragraph-rsid="00467194"/>
    </style:style>
    <style:style style:name="P124" style:family="paragraph" style:parent-style-name="Standard">
      <style:paragraph-properties fo:text-align="center" style:justify-single-word="false"/>
      <style:text-properties fo:color="#000000" loext:opacity="100%" officeooo:rsid="00489c5a" officeooo:paragraph-rsid="00489c5a"/>
    </style:style>
    <style:style style:name="P125" style:family="paragraph" style:parent-style-name="Heading_20_1">
      <style:paragraph-properties fo:margin-top="0in" fo:margin-bottom="0in" style:contextual-spacing="false" fo:text-align="center" style:justify-single-word="false" fo:break-before="page"/>
      <style:text-properties fo:color="#000000" loext:opacity="100%" style:font-name="Times New Roman" officeooo:paragraph-rsid="00489c5a" style:font-name-asian="Times New Roman1"/>
    </style:style>
    <style:style style:name="P126" style:family="paragraph" style:parent-style-name="Standard">
      <style:paragraph-properties fo:margin-top="0in" fo:margin-bottom="0.0835in" style:contextual-spacing="false" fo:line-height="150%" fo:text-align="justify" style:justify-single-word="false"/>
      <style:text-properties officeooo:rsid="00489c5a" officeooo:paragraph-rsid="00489c5a"/>
    </style:style>
    <style:style style:name="P127" style:family="paragraph" style:parent-style-name="Standard">
      <style:paragraph-properties fo:margin-top="0in" fo:margin-bottom="0.0835in" style:contextual-spacing="false" fo:line-height="150%" fo:text-align="justify" style:justify-single-word="false"/>
      <style:text-properties fo:color="#000000" loext:opacity="100%" style:font-name="Times New Roman" fo:font-size="12pt" fo:font-weight="normal" officeooo:rsid="00489c5a" officeooo:paragraph-rsid="00489c5a" style:font-name-asian="Times New Roman1" style:font-size-asian="12pt" style:font-weight-asian="normal"/>
    </style:style>
    <style:style style:name="P128" style:family="paragraph" style:parent-style-name="Standard">
      <style:paragraph-properties fo:text-align="center" style:justify-single-word="false"/>
      <style:text-properties fo:color="#000000" loext:opacity="100%" officeooo:rsid="00489c5a" officeooo:paragraph-rsid="004a2ac6"/>
    </style:style>
    <style:style style:name="P129" style:family="paragraph" style:parent-style-name="Standard">
      <style:paragraph-properties fo:text-align="center" style:justify-single-word="false"/>
      <style:text-properties fo:color="#000000" loext:opacity="100%" fo:font-size="10pt" fo:font-style="italic" officeooo:rsid="00489c5a" officeooo:paragraph-rsid="004ef91a"/>
    </style:style>
    <style:style style:name="P130" style:family="paragraph" style:parent-style-name="Standard">
      <style:paragraph-properties fo:text-align="center" style:justify-single-word="false"/>
      <style:text-properties fo:color="#000000" loext:opacity="100%" fo:font-size="10pt" fo:font-style="italic" officeooo:rsid="00489c5a" officeooo:paragraph-rsid="004a2ac6"/>
    </style:style>
    <style:style style:name="P131" style:family="paragraph" style:parent-style-name="Standard">
      <style:paragraph-properties fo:margin-top="0in" fo:margin-bottom="0.0835in" style:contextual-spacing="false" fo:orphans="2" fo:widows="2"/>
      <style:text-properties fo:color="#000000" loext:opacity="100%" style:font-name="Times New Roman" fo:font-size="10pt" fo:language="en" fo:country="US" fo:font-weight="bold" style:letter-kerning="false" style:font-size-asian="10pt" style:language-asian="en" style:country-asian="US" style:font-weight-asian="bold" style:font-size-complex="10pt" style:language-complex="ar" style:country-complex="SA"/>
    </style:style>
    <style:style style:name="P132" style:family="paragraph" style:parent-style-name="Standard">
      <style:paragraph-properties fo:margin-top="0in" fo:margin-bottom="0.0835in" style:contextual-spacing="false" fo:orphans="2" fo:widows="2"/>
      <style:text-properties fo:color="#000000" loext:opacity="100%" style:font-name="Times New Roman" fo:font-size="10pt" fo:language="en" fo:country="US" style:letter-kerning="false" style:font-size-asian="10pt" style:language-asian="en" style:country-asian="US" style:font-size-complex="10pt" style:language-complex="ar" style:country-complex="SA"/>
    </style:style>
    <style:style style:name="P133" style:family="paragraph" style:parent-style-name="Standard">
      <style:paragraph-properties fo:text-align="center" style:justify-single-word="false"/>
      <style:text-properties fo:color="#000000" loext:opacity="100%" fo:font-size="10pt" fo:font-style="italic" fo:font-weight="normal" officeooo:rsid="00489c5a" officeooo:paragraph-rsid="004b37bf" style:font-size-asian="10pt" style:font-style-asian="italic" style:font-weight-asian="normal" style:font-size-complex="10pt" style:font-style-complex="italic" style:font-weight-complex="normal"/>
    </style:style>
    <style:style style:name="P134" style:family="paragraph" style:parent-style-name="Standard">
      <style:paragraph-properties fo:text-align="center" style:justify-single-word="false"/>
      <style:text-properties fo:color="#000000" loext:opacity="100%" officeooo:rsid="00489c5a" officeooo:paragraph-rsid="004b37bf"/>
    </style:style>
    <style:style style:name="P135" style:family="paragraph" style:parent-style-name="Standard">
      <style:paragraph-properties fo:margin-top="0in" fo:margin-bottom="0.0835in" style:contextual-spacing="false" fo:line-height="150%" fo:text-align="justify" style:justify-single-word="false"/>
      <style:text-properties fo:color="#000000" loext:opacity="100%" style:font-name="Times New Roman" fo:font-size="12pt" fo:font-weight="normal" officeooo:paragraph-rsid="004b37bf" style:font-name-asian="Times New Roman1" style:font-size-asian="12pt" style:font-weight-asian="normal"/>
    </style:style>
    <style:style style:name="P136" style:family="paragraph" style:parent-style-name="Heading_20_3">
      <style:paragraph-properties fo:text-align="left" style:justify-single-word="false"/>
      <style:text-properties fo:color="#000000" loext:opacity="100%" style:font-name="Times New Roman" officeooo:paragraph-rsid="004b37bf" style:font-name-asian="Times New Roman1"/>
    </style:style>
    <style:style style:name="P137" style:family="paragraph" style:parent-style-name="Standard">
      <style:paragraph-properties fo:margin-top="0in" fo:margin-bottom="0.0835in" style:contextual-spacing="false" fo:line-height="150%" fo:text-align="justify" style:justify-single-word="false"/>
      <style:text-properties fo:color="#000000" loext:opacity="100%" style:font-name="Times New Roman" fo:font-size="12pt" fo:font-weight="normal" officeooo:paragraph-rsid="004cf338" style:font-name-asian="Times New Roman1" style:font-size-asian="12pt" style:font-weight-asian="normal"/>
    </style:style>
    <style:style style:name="P138" style:family="paragraph" style:parent-style-name="Standard">
      <style:paragraph-properties fo:text-align="center" style:justify-single-word="false"/>
      <style:text-properties fo:color="#000000" loext:opacity="100%" style:font-name="Times New Roman" fo:font-size="10pt" fo:font-style="italic" officeooo:paragraph-rsid="004cf338" style:font-size-asian="10pt" style:font-style-asian="italic"/>
    </style:style>
    <style:style style:name="P139" style:family="paragraph" style:parent-style-name="Standard">
      <style:paragraph-properties fo:text-align="center" style:justify-single-word="false"/>
      <style:text-properties fo:color="#000000" loext:opacity="100%"/>
    </style:style>
    <style:style style:name="P140" style:family="paragraph" style:parent-style-name="Standard">
      <style:paragraph-properties fo:text-align="center" style:justify-single-word="false"/>
      <style:text-properties fo:color="#000000" loext:opacity="100%" style:font-name="Times New Roman" fo:font-size="10pt" fo:font-style="italic" style:font-size-asian="10pt" style:font-style-asian="italic"/>
    </style:style>
    <style:style style:name="P141" style:family="paragraph" style:parent-style-name="Heading_20_3">
      <style:paragraph-properties fo:margin-top="0in" fo:margin-bottom="0.0835in" style:contextual-spacing="false" fo:line-height="150%" fo:text-align="justify" style:justify-single-word="false"/>
      <style:text-properties fo:color="#000000" loext:opacity="100%" style:font-name="Times New Roman" style:font-name-asian="Times New Roman1"/>
    </style:style>
    <style:style style:name="P142" style:family="paragraph" style:parent-style-name="Heading_20_4">
      <style:paragraph-properties fo:margin-top="0in" fo:margin-bottom="0.0835in" style:contextual-spacing="false"/>
      <style:text-properties fo:color="#000000" loext:opacity="100%" style:font-name="Times New Roman" style:font-name-asian="Times New Roman1"/>
    </style:style>
    <style:style style:name="P143" style:family="paragraph" style:parent-style-name="Table_20_Heading">
      <style:paragraph-properties fo:text-align="left" style:justify-single-word="false"/>
    </style:style>
    <style:style style:name="P144" style:family="paragraph" style:parent-style-name="Table_20_Contents">
      <style:paragraph-properties fo:text-align="left" style:justify-single-word="false"/>
    </style:style>
    <style:style style:name="P145" style:family="paragraph" style:parent-style-name="Text_20_body">
      <style:text-properties fo:color="#000000" loext:opacity="100%" officeooo:paragraph-rsid="004cf338"/>
    </style:style>
    <style:style style:name="P146" style:family="paragraph" style:parent-style-name="Heading_20_4">
      <style:paragraph-properties fo:margin-top="0in" fo:margin-bottom="0.0835in" style:contextual-spacing="false"/>
      <style:text-properties fo:color="#000000" loext:opacity="100%" style:font-name="Times New Roman" officeooo:paragraph-rsid="004cf338" style:font-name-asian="Times New Roman1"/>
    </style:style>
    <style:style style:name="P147" style:family="paragraph" style:parent-style-name="Standard">
      <style:paragraph-properties fo:margin-top="0in" fo:margin-bottom="0.0835in" style:contextual-spacing="false" fo:line-height="150%" fo:text-align="justify" style:justify-single-word="false" fo:break-before="column"/>
      <style:text-properties fo:color="#000000" loext:opacity="100%" style:font-name="Times New Roman" fo:font-size="12pt" fo:font-weight="normal" style:font-name-asian="Times New Roman1" style:font-size-asian="12pt" style:font-weight-asian="normal"/>
    </style:style>
    <style:style style:name="P148" style:family="paragraph" style:parent-style-name="Standard">
      <style:paragraph-properties fo:margin-top="0in" fo:margin-bottom="0.0835in" style:contextual-spacing="false" fo:orphans="2" fo:widows="2"/>
      <style:text-properties fo:color="#000000" loext:opacity="100%" style:font-name="Times New Roman" fo:font-size="12pt" fo:language="en" fo:country="US" fo:font-weight="bold" style:letter-kerning="false" style:font-size-asian="12pt" style:language-asian="en" style:country-asian="US" style:font-weight-asian="bold" style:font-size-complex="11pt" style:language-complex="ar" style:country-complex="SA"/>
    </style:style>
    <style:style style:name="P149" style:family="paragraph" style:parent-style-name="Standard">
      <style:paragraph-properties fo:margin-top="0in" fo:margin-bottom="0.0835in" style:contextual-spacing="false" fo:orphans="2" fo:widows="2"/>
      <style:text-properties fo:color="#000000" loext:opacity="100%" style:font-name="Times New Roman" fo:font-size="12pt" fo:language="en" fo:country="US" style:letter-kerning="false" style:font-size-asian="12pt" style:language-asian="en" style:country-asian="US" style:font-size-complex="11pt" style:language-complex="ar" style:country-complex="SA"/>
    </style:style>
    <style:style style:name="P150" style:family="paragraph" style:parent-style-name="Heading_20_3">
      <style:text-properties fo:color="#000000" loext:opacity="100%"/>
    </style:style>
    <style:style style:name="P151" style:family="paragraph" style:parent-style-name="Standard">
      <style:paragraph-properties fo:margin-left="0.5in" fo:line-height="150%" fo:text-indent="-0.5in" style:auto-text-indent="false"/>
      <style:text-properties fo:color="#000000" loext:opacity="100%" style:font-name="Times New Roman" fo:font-size="12pt" style:font-size-asian="12pt"/>
    </style:style>
    <style:style style:name="P152" style:family="paragraph" style:parent-style-name="Text_20_body">
      <style:text-properties officeooo:paragraph-rsid="003906d9"/>
    </style:style>
    <style:style style:name="P153" style:family="paragraph" style:parent-style-name="Text_20_body">
      <style:paragraph-properties fo:line-height="150%"/>
      <style:text-properties officeooo:paragraph-rsid="003906d9"/>
    </style:style>
    <style:style style:name="P154" style:family="paragraph" style:parent-style-name="Text_20_body">
      <style:paragraph-properties fo:line-height="150%"/>
      <style:text-properties fo:color="#000000" loext:opacity="100%" style:font-name="Times New Roman" fo:font-size="12pt" style:font-size-asian="12pt"/>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style:font-size-asian="14pt" style:font-size-complex="14pt"/>
    </style:style>
    <style:style style:name="T3" style:family="text">
      <style:text-properties fo:color="#000000" loext:opacity="100%" style:font-name="Times New Roman" fo:font-size="14pt" officeooo:rsid="0022e267" style:font-size-asian="14pt" style:font-name-complex="Times New Roman1" style:font-size-complex="14pt" style:font-weight-complex="bold">
        <loext:char-complex-color loext:theme-type="dark1" loext:color-type="theme"/>
      </style:text-properties>
    </style:style>
    <style:style style:name="T4" style:family="text">
      <style:text-properties fo:color="#000000" loext:opacity="100%" style:font-name="Times New Roman" fo:font-size="14pt" officeooo:rsid="002b4914" style:font-size-asian="14pt" style:font-name-complex="Times New Roman1" style:font-size-complex="14pt" style:font-weight-complex="bold">
        <loext:char-complex-color loext:theme-type="dark1" loext:color-type="theme"/>
      </style:text-properties>
    </style:style>
    <style:style style:name="T5" style:family="text">
      <style:text-properties fo:color="#000000" loext:opacity="100%" style:font-name="Times New Roman" fo:font-size="13pt" style:font-size-asian="13pt" style:font-name-complex="Times New Roman1" style:font-size-complex="13pt" style:font-weight-complex="bold">
        <loext:char-complex-color loext:theme-type="dark1" loext:color-type="theme"/>
      </style:text-properties>
    </style:style>
    <style:style style:name="T6" style:family="text">
      <style:text-properties fo:color="#000000" loext:opacity="100%" style:font-name="Times New Roman" fo:font-size="13pt" officeooo:rsid="0021661c" style:font-size-asian="13pt" style:font-name-complex="Times New Roman1" style:font-size-complex="13pt" style:font-weight-complex="bold">
        <loext:char-complex-color loext:theme-type="dark1" loext:color-type="theme"/>
      </style:text-properties>
    </style:style>
    <style:style style:name="T7" style:family="text">
      <style:text-properties fo:color="#000000" loext:opacity="100%" style:font-name="Times New Roman" fo:font-size="12pt" fo:font-weight="bold" style:font-size-asian="12pt" style:font-weight-asian="bold" style:font-name-complex="Times New Roman1" style:font-size-complex="12pt" style:font-weight-complex="bold">
        <loext:char-complex-color loext:theme-type="dark1" loext:color-type="theme"/>
      </style:text-properties>
    </style:style>
    <style:style style:name="T8" style:family="text">
      <style:text-properties fo:font-size="11pt" style:font-size-asian="11pt" style:font-size-complex="11pt"/>
    </style:style>
    <style:style style:name="T9" style:family="text">
      <style:text-properties fo:font-size="12pt" style:font-size-asian="12pt" style:font-size-complex="12pt"/>
    </style:style>
    <style:style style:name="T10" style:family="text">
      <style:text-properties officeooo:rsid="0022e267"/>
    </style:style>
    <style:style style:name="T11" style:family="text">
      <style:text-properties fo:font-weight="bold" style:font-weight-asian="bold" style:font-weight-complex="bold"/>
    </style:style>
    <style:style style:name="T12" style:family="text">
      <style:text-properties fo:font-weight="bold" officeooo:rsid="0022e267" style:font-weight-asian="bold" style:font-weight-complex="bold"/>
    </style:style>
    <style:style style:name="T13" style:family="text">
      <style:text-properties fo:font-size="12pt" style:font-name-asian="NimbusRomNo9L-Regu" style:font-size-asian="12pt" style:font-name-complex="NimbusRomNo9L-Regu" style:font-size-complex="12pt"/>
    </style:style>
    <style:style style:name="T14" style:family="text">
      <style:text-properties style:font-name="Times New Roman" fo:font-size="12pt" fo:font-weight="bold" style:font-name-asian="NimbusRomNo9L-Regu" style:font-size-asian="12pt" style:font-weight-asian="bold" style:font-name-complex="Times New Roman1" style:font-size-complex="12pt" style:font-weight-complex="bold"/>
    </style:style>
    <style:style style:name="T15" style:family="text">
      <style:text-properties style:font-name="Times New Roman" fo:font-size="12pt" style:font-name-asian="NimbusRomNo9L-Regu" style:font-size-asian="12pt" style:font-name-complex="Times New Roman1" style:font-size-complex="12pt"/>
    </style:style>
    <style:style style:name="T16" style:family="text">
      <style:text-properties style:font-name="Times New Roman" fo:font-size="10.5pt" style:font-name-asian="NimbusRomNo9L-Regu" style:font-size-asian="10.5pt" style:font-name-complex="Times New Roman1" style:font-size-complex="10.5pt"/>
    </style:style>
    <style:style style:name="T17" style:family="text">
      <style:text-properties fo:color="#000000" loext:opacity="100%" style:font-name="Times New Roman" fo:font-size="12pt" style:font-size-asian="12pt" style:font-name-complex="Times New Roman1" style:font-size-complex="12pt">
        <loext:char-complex-color loext:theme-type="dark1" loext:color-type="theme"/>
      </style:text-properties>
    </style:style>
    <style:style style:name="T18" style:family="text">
      <style:text-properties fo:color="#000000" loext:opacity="100%" style:font-name-complex="Times New Roman1" style:font-size-complex="12pt">
        <loext:char-complex-color loext:theme-type="dark1" loext:color-type="theme"/>
      </style:text-properties>
    </style:style>
    <style:style style:name="T19" style:family="text">
      <style:text-properties fo:color="#000000" loext:opacity="100%" officeooo:rsid="0022e267" style:font-name-complex="Times New Roman1" style:font-size-complex="12pt">
        <loext:char-complex-color loext:theme-type="dark1" loext:color-type="theme"/>
      </style:text-properties>
    </style:style>
    <style:style style:name="T20" style:family="text">
      <style:text-properties fo:color="#000000" loext:opacity="100%" style:font-name="Times New Roman" fo:font-size="12pt" fo:language="en" fo:country="US" style:letter-kerning="false" style:font-size-asian="12pt" style:language-asian="en" style:country-asian="US" style:font-name-complex="Times New Roman1" style:font-size-complex="11pt" style:language-complex="ar" style:country-complex="SA"/>
    </style:style>
    <style:style style:name="T21" style:family="text">
      <style:text-properties fo:color="#000000" loext:opacity="100%" style:font-name="Times New Roman" fo:font-size="12pt" fo:language="en" fo:country="US" officeooo:rsid="0022e267" style:letter-kerning="false" style:font-size-asian="12pt" style:language-asian="en" style:country-asian="US" style:font-name-complex="Times New Roman1" style:font-size-complex="11pt" style:language-complex="ar" style:country-complex="SA"/>
    </style:style>
    <style:style style:name="T22" style:family="text">
      <style:text-properties fo:color="#000000" loext:opacity="100%" style:font-name="Times New Roman" fo:font-size="12pt" fo:language="en" fo:country="US" officeooo:rsid="0022e267" style:letter-kerning="false" style:font-size-asian="12pt" style:language-asian="en" style:country-asian="US" style:font-name-complex="Times New Roman1" style:font-size-complex="12pt" style:language-complex="ar" style:country-complex="SA">
        <loext:char-complex-color loext:theme-type="dark1" loext:color-type="theme"/>
      </style:text-properties>
    </style:style>
    <style:style style:name="T23" style:family="text">
      <style:text-properties fo:color="#000000" loext:opacity="100%" fo:font-weight="bold" style:font-weight-asian="normal" style:font-weight-complex="normal">
        <loext:char-complex-color loext:theme-type="dark1" loext:color-type="theme"/>
      </style:text-properties>
    </style:style>
    <style:style style:name="T24" style:family="text">
      <style:text-properties fo:color="#000000" loext:opacity="100%" style:font-name="Times New Roman" fo:font-size="12pt" fo:font-weight="normal" style:font-name-asian="Times New Roman1" style:font-size-asian="12pt" style:font-weight-asian="normal" style:font-name-complex="Times New Roman1" style:font-size-complex="12pt"/>
    </style:style>
    <style:style style:name="T25" style:family="text">
      <style:text-properties officeooo:rsid="0024e099"/>
    </style:style>
    <style:style style:name="T26" style:family="text">
      <style:text-properties style:font-name="Times New Roman" style:font-name-asian="NimbusRomNo9L-Regu" style:font-name-complex="Times New Roman1"/>
    </style:style>
    <style:style style:name="T27" style:family="text">
      <style:text-properties style:font-name="Times New Roman" officeooo:rsid="00246eb6" style:font-name-asian="NimbusRomNo9L-Regu" style:font-name-complex="Times New Roman1"/>
    </style:style>
    <style:style style:name="T28" style:family="text">
      <style:text-properties style:font-name="Times New Roman" officeooo:rsid="00246eb6" style:font-name-asian="Times New Roman1"/>
    </style:style>
    <style:style style:name="T29" style:family="text">
      <style:text-properties style:font-name="Times New Roman" style:font-name-asian="Times New Roman1"/>
    </style:style>
    <style:style style:name="T30" style:family="text">
      <style:text-properties officeooo:rsid="00343fbe"/>
    </style:style>
    <style:style style:name="T31" style:family="text">
      <style:text-properties fo:background-color="#ffff00" loext:char-shading-value="0"/>
    </style:style>
    <style:style style:name="T32" style:family="text">
      <style:text-properties officeooo:rsid="0030f075"/>
    </style:style>
    <style:style style:name="T33" style:family="text">
      <style:text-properties officeooo:rsid="002b920d"/>
    </style:style>
    <style:style style:name="T34" style:family="text">
      <style:text-properties officeooo:rsid="002ccc9c"/>
    </style:style>
    <style:style style:name="T35" style:family="text">
      <style:text-properties fo:font-size="10pt" fo:font-style="italic" style:font-size-asian="10pt" style:font-style-asian="italic"/>
    </style:style>
    <style:style style:name="T36" style:family="text">
      <style:text-properties fo:font-size="10pt" fo:font-style="italic" officeooo:rsid="0030f075" style:font-size-asian="10pt" style:font-style-asian="italic"/>
    </style:style>
    <style:style style:name="T37" style:family="text">
      <style:text-properties fo:font-size="10pt" fo:font-style="italic" officeooo:rsid="00304d7c" style:font-size-asian="10pt" style:font-style-asian="italic"/>
    </style:style>
    <style:style style:name="T38" style:family="text">
      <style:text-properties fo:color="#000000" loext:opacity="100%" fo:font-weight="bold" officeooo:rsid="00304d7c" style:font-weight-asian="bold" style:font-weight-complex="bold"/>
    </style:style>
    <style:style style:name="T39" style:family="text">
      <style:text-properties fo:font-weight="bold"/>
    </style:style>
    <style:style style:name="T40" style:family="text">
      <style:text-properties fo:font-style="italic" fo:font-weight="normal" officeooo:rsid="0030f075" style:font-style-asian="italic" style:font-weight-asian="normal" style:font-style-complex="italic" style:font-weight-complex="normal"/>
    </style:style>
    <style:style style:name="T41" style:family="text">
      <style:text-properties fo:font-style="italic" fo:font-weight="normal" style:font-style-asian="italic" style:font-weight-asian="normal" style:font-style-complex="italic" style:font-weight-complex="normal"/>
    </style:style>
    <style:style style:name="T42" style:family="text">
      <style:text-properties fo:color="#000000" loext:opacity="100%" style:font-name="Times New Roman" fo:font-size="12pt" fo:font-weight="bold" officeooo:rsid="00304d7c" style:font-name-asian="Times New Roman1" style:font-size-asian="12pt" style:font-weight-asian="bold" style:font-weight-complex="bold"/>
    </style:style>
    <style:style style:name="T43" style:family="text">
      <style:text-properties officeooo:rsid="002cb8bc"/>
    </style:style>
    <style:style style:name="T44" style:family="text">
      <style:text-properties fo:background-color="transparent" loext:char-shading-value="0"/>
    </style:style>
    <style:style style:name="T45" style:family="text">
      <style:text-properties officeooo:rsid="0041fc3d" fo:background-color="transparent" loext:char-shading-value="0"/>
    </style:style>
    <style:style style:name="T46" style:family="text">
      <style:text-properties officeooo:rsid="00447220"/>
    </style:style>
    <style:style style:name="T47" style:family="text">
      <style:text-properties officeooo:rsid="00333486"/>
    </style:style>
    <style:style style:name="T48" style:family="text">
      <style:text-properties fo:color="#000000" loext:opacity="100%" style:font-name="Times New Roman" style:font-name-asian="Times New Roman1"/>
    </style:style>
    <style:style style:name="T49" style:family="text">
      <style:text-properties style:font-name="Times New Roman" fo:font-weight="normal" style:font-name-asian="Times New Roman1" style:font-weight-asian="normal"/>
    </style:style>
    <style:style style:name="T50" style:family="text">
      <style:text-properties officeooo:rsid="00372ca8"/>
    </style:style>
    <style:style style:name="T51" style:family="text">
      <style:text-properties fo:font-size="10pt" style:font-size-asian="10pt"/>
    </style:style>
    <style:style style:name="T52" style:family="text">
      <style:text-properties fo:font-size="10pt" officeooo:rsid="0030f075" style:font-size-asian="10pt"/>
    </style:style>
    <style:style style:name="T53" style:family="text">
      <style:text-properties style:font-name="Times New Roman" fo:font-size="12pt" style:font-size-asian="12pt"/>
    </style:style>
    <style:style style:name="T54" style:family="text">
      <style:text-properties fo:font-size="10pt" officeooo:rsid="00304d7c" style:font-size-asian="10pt"/>
    </style:style>
    <style:style style:name="T55" style:family="text">
      <style:text-properties officeooo:rsid="003b592a"/>
    </style:style>
    <style:style style:name="T56" style:family="text">
      <style:text-properties fo:font-style="italic" style:font-style-asian="italic" style:font-style-complex="italic"/>
    </style:style>
    <style:style style:name="T57" style:family="text">
      <style:text-properties officeooo:rsid="003a4ea5"/>
    </style:style>
    <style:style style:name="T58" style:family="text">
      <style:text-properties fo:font-style="italic" officeooo:rsid="003906d9" style:font-style-asian="italic" style:font-style-complex="italic"/>
    </style:style>
    <style:style style:name="T59" style:family="text">
      <style:text-properties fo:font-weight="normal" style:font-weight-asian="normal" style:font-weight-complex="normal"/>
    </style:style>
    <style:style style:name="T60" style:family="text">
      <style:text-properties fo:color="#000000" loext:opacity="100%" style:font-name="Times New Roman" fo:font-size="12pt" fo:font-weight="normal" style:font-name-asian="Times New Roman1" style:font-size-asian="12pt" style:font-weight-asian="normal" style:font-weight-complex="normal"/>
    </style:style>
    <style:style style:name="T61" style:family="text">
      <style:text-properties fo:color="#000000" loext:opacity="100%" style:font-name="Times New Roman" fo:font-size="12pt" fo:font-weight="normal" officeooo:rsid="003e0379" style:font-name-asian="Times New Roman1" style:font-size-asian="12pt" style:font-weight-asian="normal" style:font-weight-complex="normal"/>
    </style:style>
    <style:style style:name="T62" style:family="text">
      <style:text-properties fo:color="#000000" loext:opacity="100%" fo:font-style="italic" fo:font-weight="normal" style:font-style-asian="italic" style:font-weight-asian="normal" style:font-style-complex="italic"/>
    </style:style>
    <style:style style:name="T63" style:family="text">
      <style:text-properties fo:color="#000000" loext:opacity="100%" fo:font-weight="normal" style:font-weight-asian="normal"/>
    </style:style>
    <style:style style:name="T64" style:family="text">
      <style:text-properties fo:font-weight="normal" officeooo:rsid="0046fb96" style:font-weight-asian="normal" style:font-weight-complex="normal"/>
    </style:style>
    <style:style style:name="T65" style:family="text">
      <style:text-properties fo:font-size="10pt" fo:font-style="italic"/>
    </style:style>
    <style:style style:name="T66" style:family="text">
      <style:text-properties style:font-name="Times New Roman" fo:font-size="10pt" fo:font-style="italic" style:font-name-asian="Times New Roman1"/>
    </style:style>
    <style:style style:name="T67" style:family="text">
      <style:text-properties fo:color="#000000" loext:opacity="100%" style:font-name="Times New Roman" fo:font-size="12pt" fo:font-weight="normal" style:font-name-asian="Times New Roman1" style:font-size-asian="12pt" style:font-weight-asian="normal"/>
    </style:style>
    <style:style style:name="T68" style:family="text">
      <style:text-properties fo:color="#000000" loext:opacity="100%" style:font-name="Times New Roman" fo:font-size="12pt" fo:font-weight="normal" style:font-size-asian="12pt" style:font-weight-asian="normal"/>
    </style:style>
    <style:style style:name="T69" style:family="text">
      <style:text-properties style:font-name="Times New Roman"/>
    </style:style>
    <style:style style:name="T70" style:family="text">
      <style:text-properties fo:font-size="10pt" fo:font-style="italic" officeooo:rsid="004a2ac6"/>
    </style:style>
    <style:style style:name="T71" style:family="text">
      <style:text-properties style:font-name="Times New Roman" fo:font-size="10pt" fo:font-style="italic" officeooo:rsid="004a2ac6"/>
    </style:style>
    <style:style style:name="T72" style:family="text">
      <style:text-properties officeooo:rsid="004a2ac6"/>
    </style:style>
    <style:style style:name="T73" style:family="text">
      <style:text-properties officeooo:rsid="004ef91a"/>
    </style:style>
    <style:style style:name="T74" style:family="text">
      <style:text-properties fo:font-size="10pt" fo:font-style="italic" officeooo:rsid="00489c5a"/>
    </style:style>
    <style:style style:name="T75" style:family="text">
      <style:text-properties officeooo:rsid="004b37bf"/>
    </style:style>
    <style:style style:name="T76" style:family="text">
      <style:text-properties fo:font-size="10pt" fo:font-style="italic" officeooo:rsid="004b37bf"/>
    </style:style>
    <style:style style:name="T77" style:family="text">
      <style:text-properties fo:font-style="normal" style:font-style-asian="normal" style:font-style-complex="normal"/>
    </style:style>
    <style:style style:name="T78" style:family="text">
      <style:text-properties fo:color="#000000" loext:opacity="100%"/>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256in" fo:margin-right="0.1256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bookmark text:name="_63bwqj24yqm"/>ARDHI UNIVERSITY</text:p>
      <text:p text:style-name="P2" loext:marker-style-name="T2"><draw:frame draw:style-name="fr1" draw:name="image1.jpg" text:anchor-type="as-char" svg:width="2.6457in" svg:height="2.5402in" draw:z-index="7"><draw:image xlink:href="Pictures/10000000000000E2000000DFED811BF6.jpg" xlink:type="simple" xlink:show="embed" xlink:actuate="onLoad" draw:mime-type="image/jpeg"/></draw:frame></text:p>
      <text:p text:style-name="P3">DEPARTMENT OF COMPUTER SYSTEMS AND MATHEMATICS (CSM)</text:p>
      <text:p text:style-name="P4"><text:span text:style-name="T3">BACHELOR</text:span><text:span text:style-name="T4">S</text:span><text:span text:style-name="T3"> IN </text:span><text:span text:style-name="T5">DATA SCIENCE AND ARTIFICIAL </text:span></text:p>
      <text:p text:style-name="P4"><text:span text:style-name="T5">INTELLIGENCE </text:span><text:span text:style-name="T6">(Bsc. DSAi)</text:span></text:p>
      <text:p text:style-name="P5">DA 181: PROBLEM SOLVING USING FUNDAMENTAL CONCEPTS OF DATA SCIENCE AND ARTIFICIAL INTELLIGENCE.</text:p>
      <text:p text:style-name="P6"><text:tab/></text:p>
      <text:p text:style-name="P7"><text:span text:style-name="T7">PROJECT TITLE: </text:span><text:span text:style-name="T8"><text:tab/></text:span><text:span text:style-name="T9">EF-02 FINANCIAL SENTIMENT ANALYSER FOR ECONOMIC FORECASTING</text:span></text:p>
      <text:p text:style-name="P8"/>
      <text:p text:style-name="P9"><text:span text:style-name="T10">GROUP (5) MEMBERS<text:tab/></text:span>: <text:s text:c="6"/></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0">S/N</text:p>
          </table:table-cell>
          <table:table-cell table:style-name="Table1.A1" office:value-type="string">
            <text:p text:style-name="P10">FULL NAMES</text:p>
          </table:table-cell>
          <table:table-cell table:style-name="Table1.A1" office:value-type="string">
            <text:p text:style-name="P10">REG.NO.</text:p>
          </table:table-cell>
          <table:table-cell table:style-name="Table1.A1" office:value-type="string">
            <text:p text:style-name="P10">SIGNATURE</text:p>
          </table:table-cell>
        </table:table-row>
        <table:table-row table:style-name="Table1.2">
          <table:table-cell table:style-name="Table1.A1" office:value-type="string">
            <text:list text:style-name="WWNum1">
              <text:list-item>
                <text:p text:style-name="P11"/>
              </text:list-item>
            </text:list>
          </table:table-cell>
          <table:table-cell table:style-name="Table1.A1" office:value-type="string">
            <text:p text:style-name="P10">KITULA, KITULA-MASAGANYA ABDUL </text:p>
          </table:table-cell>
          <table:table-cell table:style-name="Table1.A1" office:value-type="string">
            <text:p text:style-name="P12">35552/T.2025</text:p>
          </table:table-cell>
          <table:table-cell table:style-name="Table1.A1" office:value-type="string">
            <text:p text:style-name="P10"/>
          </table:table-cell>
        </table:table-row>
        <table:table-row table:style-name="Table1.3">
          <table:table-cell table:style-name="Table1.A1" office:value-type="string">
            <text:list text:continue-numbering="true" text:style-name="WWNum1">
              <text:list-item>
                <text:p text:style-name="P13"/>
              </text:list-item>
            </text:list>
          </table:table-cell>
          <table:table-cell table:style-name="Table1.A1" office:value-type="string">
            <text:p text:style-name="P10">ILEKA, REVOCATUS OREST</text:p>
          </table:table-cell>
          <table:table-cell table:style-name="Table1.A1" office:value-type="string">
            <text:p text:style-name="P12">37058/T.2025 </text:p>
          </table:table-cell>
          <table:table-cell table:style-name="Table1.A1" office:value-type="string">
            <text:p text:style-name="P10"/>
          </table:table-cell>
        </table:table-row>
        <table:table-row table:style-name="Table1.3">
          <table:table-cell table:style-name="Table1.A1" office:value-type="string">
            <text:list text:continue-numbering="true" text:style-name="WWNum1">
              <text:list-item>
                <text:p text:style-name="P11"/>
              </text:list-item>
            </text:list>
          </table:table-cell>
          <table:table-cell table:style-name="Table1.A1" office:value-type="string">
            <text:p text:style-name="P10">LYELLU, SABRINA RASHID</text:p>
          </table:table-cell>
          <table:table-cell table:style-name="Table1.A1" office:value-type="string">
            <text:p text:style-name="P12">37463/T.2025 </text:p>
          </table:table-cell>
          <table:table-cell table:style-name="Table1.A1" office:value-type="string">
            <text:p text:style-name="P10"/>
          </table:table-cell>
        </table:table-row>
        <table:table-row table:style-name="Table1.5">
          <table:table-cell table:style-name="Table1.A1" office:value-type="string">
            <text:list text:continue-numbering="true" text:style-name="WWNum1">
              <text:list-item>
                <text:p text:style-name="P14"/>
              </text:list-item>
            </text:list>
          </table:table-cell>
          <table:table-cell table:style-name="Table1.A1" office:value-type="string">
            <text:p text:style-name="P10">IBRAHIM, GHADHAL NKRUMAH</text:p>
          </table:table-cell>
          <table:table-cell table:style-name="Table1.A1" office:value-type="string">
            <text:p text:style-name="P12">37254/T.2025 </text:p>
          </table:table-cell>
          <table:table-cell table:style-name="Table1.A1" office:value-type="string">
            <text:p text:style-name="P10"/>
          </table:table-cell>
        </table:table-row>
      </table:table>
      <text:h text:style-name="P15" text:outline-level="1"/>
      <text:h text:style-name="P16" text:outline-level="1"><text:bookmark-start text:name="__RefHeading___Toc4323_3468845459"/>DECLARATION<text:bookmark-end text:name="__RefHeading___Toc4323_3468845459"/></text:h>
      <text:p text:style-name="P17">We, the members of <text:span text:style-name="T11">Group </text:span><text:span text:style-name="T12">5</text:span><text:span text:style-name="T10"> </text:span>, hereby declare that this report is our own work and effort. The work in this report was carried out in accordance with the Regulations of Ardhi University. We have faithfully acknowledged, given credit to, and referred to the research workers wherever their work has been cited in the text and the body of this project. We further certify that we have not willfully lifted another person's paragraph, text, data, or results reported in journals, books, magazines, reports, dissertations, theses, or available at websites and included them in this project and cited them as our own work.</text:p>
      <text:p text:style-name="P18" loext:marker-style-name="T13"/>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19" loext:marker-style-name="T14"><text:span text:style-name="T14">S/no</text:span></text:p>
          </table:table-cell>
          <table:table-cell table:style-name="Table8.A1" office:value-type="string">
            <text:p text:style-name="P20" loext:marker-style-name="T15"><text:span text:style-name="T7">Student’s Name</text:span></text:p>
          </table:table-cell>
          <table:table-cell table:style-name="Table8.A1" office:value-type="string">
            <text:p text:style-name="P20" loext:marker-style-name="T15"><text:span text:style-name="T7">Signature</text:span></text:p>
          </table:table-cell>
          <table:table-cell table:style-name="Table8.A1" office:value-type="string">
            <text:p text:style-name="P20" loext:marker-style-name="T14"><text:span text:style-name="T14">Date</text:span></text:p>
          </table:table-cell>
        </table:table-row>
        <table:table-row table:style-name="Table8.1">
          <table:table-cell table:style-name="Table8.A1" office:value-type="string">
            <text:p text:style-name="P21" loext:marker-style-name="T16"/>
            <text:p text:style-name="P20" loext:marker-style-name="T15"><text:span text:style-name="T15">1</text:span></text:p>
          </table:table-cell>
          <table:table-cell table:style-name="Table8.A1" office:value-type="string">
            <text:p text:style-name="P22" loext:marker-style-name="T17"/>
            <text:p text:style-name="P23"><text:span text:style-name="T18">KITULA, </text:span><text:span text:style-name="T19">Kitula-Masaganya Abdul</text:span></text:p>
          </table:table-cell>
          <table:table-cell table:style-name="Table8.A1" office:value-type="string">
            <text:p text:style-name="P24" loext:marker-style-name="T15"/>
            <text:p text:style-name="P19" loext:marker-style-name="T15"><text:span text:style-name="T15">…………….………</text:span></text:p>
          </table:table-cell>
          <table:table-cell table:style-name="Table8.A1" office:value-type="string">
            <text:p text:style-name="P24" loext:marker-style-name="T15"/>
            <text:p text:style-name="P19" loext:marker-style-name="T15"><text:span text:style-name="T15">………………..</text:span></text:p>
          </table:table-cell>
        </table:table-row>
        <table:table-row table:style-name="Table8.1">
          <table:table-cell table:style-name="Table8.A1" office:value-type="string">
            <text:p text:style-name="P25" loext:marker-style-name="T15"/>
            <text:p text:style-name="P20" loext:marker-style-name="T15"><text:span text:style-name="T15">2</text:span></text:p>
          </table:table-cell>
          <table:table-cell table:style-name="Table8.A1" office:value-type="string">
            <text:p text:style-name="P22" loext:marker-style-name="T17"/>
            <text:p text:style-name="P19" loext:marker-style-name="T15"><text:span text:style-name="T20">ILEKA, </text:span><text:span text:style-name="T21">Revocatus Orest</text:span><text:span text:style-name="T17"> </text:span></text:p>
          </table:table-cell>
          <table:table-cell table:style-name="Table8.A1" office:value-type="string">
            <text:p text:style-name="P24" loext:marker-style-name="T15"/>
            <text:p text:style-name="P19" loext:marker-style-name="T15"><text:span text:style-name="T15">……………………</text:span></text:p>
          </table:table-cell>
          <table:table-cell table:style-name="Table8.A1" office:value-type="string">
            <text:p text:style-name="P24" loext:marker-style-name="T15"/>
            <text:p text:style-name="P19" loext:marker-style-name="T15"><text:span text:style-name="T15">………………..</text:span></text:p>
          </table:table-cell>
        </table:table-row>
        <table:table-row table:style-name="Table8.1">
          <table:table-cell table:style-name="Table8.A1" office:value-type="string">
            <text:p text:style-name="P25" loext:marker-style-name="T15"/>
            <text:p text:style-name="P20" loext:marker-style-name="T15"><text:span text:style-name="T15">3</text:span></text:p>
          </table:table-cell>
          <table:table-cell table:style-name="Table8.A1" office:value-type="string">
            <text:p text:style-name="P22" loext:marker-style-name="T17"/>
            <text:p text:style-name="P23"><text:span text:style-name="T18">LYELLU, </text:span><text:span text:style-name="T19">Sabrina Rashid</text:span></text:p>
          </table:table-cell>
          <table:table-cell table:style-name="Table8.A1" office:value-type="string">
            <text:p text:style-name="P24" loext:marker-style-name="T15"/>
            <text:p text:style-name="P19" loext:marker-style-name="T15"><text:span text:style-name="T15">……………………</text:span></text:p>
          </table:table-cell>
          <table:table-cell table:style-name="Table8.A1" office:value-type="string">
            <text:p text:style-name="P24" loext:marker-style-name="T15"/>
            <text:p text:style-name="P19" loext:marker-style-name="T15"><text:span text:style-name="T15">………………..</text:span></text:p>
          </table:table-cell>
        </table:table-row>
        <table:table-row table:style-name="Table8.1">
          <table:table-cell table:style-name="Table8.A1" office:value-type="string">
            <text:p text:style-name="P25" loext:marker-style-name="T15"/>
            <text:p text:style-name="P20" loext:marker-style-name="T15"><text:span text:style-name="T15">4</text:span></text:p>
          </table:table-cell>
          <table:table-cell table:style-name="Table8.A1" office:value-type="string">
            <text:p text:style-name="P22" loext:marker-style-name="T17"/>
            <text:p text:style-name="P19" loext:marker-style-name="T15"><text:span text:style-name="T20">IBRAHIM, </text:span><text:span text:style-name="T22">Ghadhal Nkurumah</text:span></text:p>
          </table:table-cell>
          <table:table-cell table:style-name="Table8.A1" office:value-type="string">
            <text:p text:style-name="P24" loext:marker-style-name="T15"/>
            <text:p text:style-name="P19" loext:marker-style-name="T15"><text:span text:style-name="T15">……………………</text:span></text:p>
          </table:table-cell>
          <table:table-cell table:style-name="Table8.A1" office:value-type="string">
            <text:p text:style-name="P24" loext:marker-style-name="T15"/>
            <text:p text:style-name="P19" loext:marker-style-name="T15"><text:span text:style-name="T15">………………..</text:span></text:p>
          </table:table-cell>
        </table:table-row>
      </table:table>
      <text:p text:style-name="P18" loext:marker-style-name="T13"/>
      <text:p text:style-name="P18" loext:marker-style-name="T13"/>
      <text:h text:style-name="P26" text:outline-level="1" loext:marker-style-name="T23"><text:span text:style-name="fontstyle01"><text:span text:style-name="T23"/></text:span></text:h>
      <text:h text:style-name="P27" text:outline-level="1" loext:marker-style-name="T23"><text:bookmark-start text:name="__RefHeading___Toc4325_3468845459"/><text:bookmark-start text:name="_Toc199870962"/><text:span text:style-name="fontstyle01"><text:span text:style-name="T23">CERTIFICATION</text:span></text:span><text:bookmark-end text:name="__RefHeading___Toc4325_3468845459"/><text:bookmark-end text:name="_Toc199870962"/></text:h>
      <text:p text:style-name="P28" loext:marker-style-name="T15"><text:span text:style-name="T24">The undersigned certify that they have read and hereby recommend for acceptance by Ardhi University a project titled: EF-02: Financial News Sentiment Analyser for Economic Forecasting, in fulfillment of the requirements for the accomplishment of first year studies at Ardhi University.</text:span></text:p>
      <text:p text:style-name="P29" loext:marker-style-name="T15"/>
      <text:p text:style-name="P29" loext:marker-style-name="T15"/>
      <text:p text:style-name="P29" loext:marker-style-name="T15"/>
      <text:p text:style-name="P29" loext:marker-style-name="T15"/>
      <text:p text:style-name="P29" loext:marker-style-name="T15"/>
      <text:p text:style-name="P30">………………………………</text:p>
      <text:p text:style-name="P31">Dr. <text:span text:style-name="T25">Winfrida</text:span></text:p>
      <text:p text:style-name="P31">(Supervisor)</text:p>
      <text:p text:style-name="P32"/>
      <text:p text:style-name="P30">Date: ……………….</text:p>
      <text:p text:style-name="P30"/>
      <text:p text:style-name="P30"/>
      <text:p text:style-name="P30">……………………………….</text:p>
      <text:p text:style-name="P33"><text:span text:style-name="T26">Mr. </text:span><text:span text:style-name="T27">Benitho</text:span></text:p>
      <text:p text:style-name="P30">(Supervisor)</text:p>
      <text:p text:style-name="P32"/>
      <text:p text:style-name="P30">Date: ……………….</text:p>
      <text:p text:style-name="P34" loext:marker-style-name="T15"/>
      <text:p text:style-name="P34" loext:marker-style-name="T15"/>
      <text:p text:style-name="P34" loext:marker-style-name="T15"/>
      <text:p text:style-name="P34" loext:marker-style-name="T15"/>
      <text:p text:style-name="P34" loext:marker-style-name="T15"/>
      <text:p text:style-name="P34" loext:marker-style-name="T15"/>
      <text:p text:style-name="P34" loext:marker-style-name="T15"/>
      <text:p text:style-name="P34" loext:marker-style-name="T15"><text:soft-page-break/></text:p>
      <text:h text:style-name="P35" text:outline-level="1"><text:bookmark-start text:name="__RefHeading___Toc4327_3468845459"/><text:span text:style-name="T28">A</text:span><text:span text:style-name="T29">CKNOWLEDGMENT</text:span><text:bookmark-end text:name="__RefHeading___Toc4327_3468845459"/></text:h>
      <text:p text:style-name="P36"/>
      <text:p text:style-name="P17">First and foremost, we thank Almighty God for giving us the strength and guidance to complete this project. We express our sincere gratitude to our supervisors, Mr. <text:span text:style-name="T25">Benitho and Dr. Winfrida</text:span>, for their advice, feedback, and support throughout the development of EF-02. Their guidance helped us structure our pipeline and present our findings in a clear academic manner.</text:p>
      <text:p text:style-name="P17">We also thank Ardhi University and the Department of Computer Systems and Mathematics for providing the learning environment and resources that made this work possible. We acknowledge Daily News Tanzania and The Citizen for publishing the financial news used in this study, the National Bureau of Statistics (NBS) for CPI data, and Investing.com for historical USD/TZS exchange rate data. Finally, we thank Groq for providing API access to large language models used in headline classification.</text:p>
      <text:p text:style-name="P37"/>
      <text:h text:style-name="P38" text:outline-level="1"><text:bookmark-start text:name="__RefHeading___Toc4329_3468845459"/>LIST OF ABBREVIATIONS AND ACRONYMS<text:bookmark-end text:name="__RefHeading___Toc4329_3468845459"/></text:h>
      <text:p text:style-name="P39"/>
      <table:table table:name="Table2" table:style-name="Table2">
        <table:table-column table:style-name="Table2.A"/>
        <table:table-column table:style-name="Table2.B"/>
        <table:table-row>
          <table:table-cell table:style-name="Table2.A1" office:value-type="string">
            <text:p text:style-name="P40">ARU :</text:p>
          </table:table-cell>
          <table:table-cell table:style-name="Table2.B1" office:value-type="string">
            <text:p text:style-name="P41">Ardhi University</text:p>
          </table:table-cell>
        </table:table-row>
        <table:table-row>
          <table:table-cell table:style-name="Table2.A2" office:value-type="string">
            <text:p text:style-name="P40">BOT : </text:p>
          </table:table-cell>
          <table:table-cell table:style-name="Table2.B2" office:value-type="string">
            <text:p text:style-name="P41">Bank of Tanzania</text:p>
          </table:table-cell>
        </table:table-row>
        <table:table-row>
          <table:table-cell table:style-name="Table2.A2" office:value-type="string">
            <text:p text:style-name="P40">CPI :</text:p>
          </table:table-cell>
          <table:table-cell table:style-name="Table2.B2" office:value-type="string">
            <text:p text:style-name="P41">Consumer Price Index</text:p>
          </table:table-cell>
        </table:table-row>
        <table:table-row>
          <table:table-cell table:style-name="Table2.A2" office:value-type="string">
            <text:p text:style-name="P40">CRISP-DM : </text:p>
          </table:table-cell>
          <table:table-cell table:style-name="Table2.B2" office:value-type="string">
            <text:p text:style-name="P41">Cross Industry Standard Process for Data Mining</text:p>
          </table:table-cell>
        </table:table-row>
        <table:table-row>
          <table:table-cell table:style-name="Table2.A2" office:value-type="string">
            <text:p text:style-name="P40">DSE : </text:p>
          </table:table-cell>
          <table:table-cell table:style-name="Table2.B2" office:value-type="string">
            <text:p text:style-name="P42">Dar es Salaam Stock Exchange</text:p>
          </table:table-cell>
        </table:table-row>
        <table:table-row>
          <table:table-cell table:style-name="Table2.A2" office:value-type="string">
            <text:p text:style-name="P40">FX : </text:p>
          </table:table-cell>
          <table:table-cell table:style-name="Table2.B2" office:value-type="string">
            <text:p text:style-name="P42">Foreign Exchange</text:p>
          </table:table-cell>
        </table:table-row>
        <table:table-row>
          <table:table-cell table:style-name="Table2.A2" office:value-type="string">
            <text:p text:style-name="P40">LLM : </text:p>
          </table:table-cell>
          <table:table-cell table:style-name="Table2.B2" office:value-type="string">
            <text:p text:style-name="P42">Large Language Model</text:p>
          </table:table-cell>
        </table:table-row>
        <table:table-row>
          <table:table-cell table:style-name="Table2.A2" office:value-type="string">
            <text:p text:style-name="P40">NBS : </text:p>
          </table:table-cell>
          <table:table-cell table:style-name="Table2.B2" office:value-type="string">
            <text:p text:style-name="P42">National Bureau of Statistics</text:p>
          </table:table-cell>
        </table:table-row>
        <table:table-row>
          <table:table-cell table:style-name="Table2.A2" office:value-type="string">
            <text:p text:style-name="P40">NLP : </text:p>
          </table:table-cell>
          <table:table-cell table:style-name="Table2.B2" office:value-type="string">
            <text:p text:style-name="P42">Natural Language Processing</text:p>
          </table:table-cell>
        </table:table-row>
        <table:table-row>
          <table:table-cell table:style-name="Table2.A2" office:value-type="string">
            <text:p text:style-name="P40">TZS : </text:p>
          </table:table-cell>
          <table:table-cell table:style-name="Table2.B2" office:value-type="string">
            <text:p text:style-name="P42">Tanzanian Shilling</text:p>
          </table:table-cell>
        </table:table-row>
        <table:table-row>
          <table:table-cell table:style-name="Table2.A2" office:value-type="string">
            <text:p text:style-name="P40">USD : </text:p>
          </table:table-cell>
          <table:table-cell table:style-name="Table2.B2" office:value-type="string">
            <text:p text:style-name="P42">United States Dollar</text:p>
          </table:table-cell>
        </table:table-row>
        <table:table-row>
          <table:table-cell table:style-name="Table2.A2" office:value-type="string">
            <text:p text:style-name="P43">VPC :</text:p>
            <text:p text:style-name="P43"><text:span text:style-name="T30">SDK</text:span> :</text:p>
          </table:table-cell>
          <table:table-cell table:style-name="Table2.B2" office:value-type="string">
            <text:p text:style-name="P42">Value Proposition Canvas</text:p>
            <text:p text:style-name="P42">Software Development Kit </text:p>
          </table:table-cell>
        </table:table-row>
      </table:table>
      <text:p text:style-name="P37"/>
      <text:h text:style-name="P38" text:outline-level="1"><text:bookmark-start text:name="__RefHeading___Toc4331_3468845459"/>ABSTRACT<text:bookmark-end text:name="__RefHeading___Toc4331_3468845459"/></text:h>
      <text:p text:style-name="P17">This project investigates whether the sentiment of Tanzanian financial news headlines is related to macroeconomic movements, specifically the USD/TZS exchange rate and headline inflation, between 2022 and 2024. Financial media often reflects and shapes public expectations about the economy. However, few studies have applied modern Natural Language Processing methods to Tanzanian financial news using local economic data.</text:p>
      <text:p text:style-name="P17">A six stage data science pipeline was built: web scraping from Daily News and The Citizen, data cleaning, multi model bench marking, LLM based classification via the Groq API, monthly data consolidation with NBS CPI and USD/TZS series, and visualisation with Pearson correlation analysis. A total of <text:span text:style-name="T31">5,310</text:span> headlines were collected. After relevance filtering, <text:span text:style-name="T31">72.2% (3,836 headlines)</text:span> were classified into nine economic categories and three sentiment labels based on implied economic outcome.</text:p>
      <text:p text:style-name="P17">Monthly aggregates were produced for 33 months (March 2022 to December 2024). January and February 2022 were missing from the exchange rate source. Model benchmarking showed that rule based tools (<text:span text:style-name="T31">TextBlob at 28.2% and VADER at 50.0%</text:span>) and <text:span text:style-name="T31">FinBERT at 66.7%</text:span> performed poorly on Tanzanian financial text, while large language models achieved about 93% accuracy on a labelled sample.</text:p>
      <text:p text:style-name="P44">Correlation results showed that sentiment had its strongest statistical link with the USD/TZS exchange rate level. Net Sentiment (Positive share minus Negative share) correlated with USD/TZS at r = 0.583 (p = 0.0004). Negative sentiment correlated at r = 0.484 (p = 0.0043) and Positive sentiment at r = 0.438 (p = 0.0108). Net Sentiment also showed a moderate inverse link with inflation at r = 0.413 (p = 0.017). Month on month rate changes did not show significant correlation with sentiment.</text:p>
      <text:p text:style-name="P17">The project demonstrates that Tanzanian financial news sentiment can serve as a concurrent indicator of exchange rate movement, though limitations include neutral dominance in labels, a modest monthly sample size, and the fact that correlation does not prove causation. The pipeline offers a replicable framework for future African financial NLP research.</text:p>
      <text:p text:style-name="P37"/>
      <text:h text:style-name="P38" text:outline-level="1"><text:bookmark-start text:name="__RefHeading___Toc4333_3468845459"/>TABLE OF CONTENTS<text:bookmark-end text:name="__RefHeading___Toc4333_3468845459"/></text:h>
      <text:table-of-content text:style-name="Sect1" text:protected="true" text:name="Table of Contents1">
        <text:table-of-content-source text:outline-level="7"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5"><text:a xlink:type="simple" xlink:href="#__RefHeading___Toc4323_3468845459" office:name="DECLARATION" text:style-name="Index_20_Link" text:visited-style-name="Index_20_Link">DECLARATION<text:tab/>i</text:a></text:p>
          <text:p text:style-name="P45"><text:a xlink:type="simple" xlink:href="#__RefHeading___Toc4325_3468845459" office:name="CERTIFICATION" text:style-name="Index_20_Link" text:visited-style-name="Index_20_Link">CERTIFICATION<text:tab/>ii</text:a></text:p>
          <text:p text:style-name="P45"><text:a xlink:type="simple" xlink:href="#__RefHeading___Toc4327_3468845459" office:name="ACKNOWLEDGMENT" text:style-name="Index_20_Link" text:visited-style-name="Index_20_Link">ACKNOWLEDGMENT<text:tab/>iii</text:a></text:p>
          <text:p text:style-name="P45"><text:a xlink:type="simple" xlink:href="#__RefHeading___Toc4329_3468845459" office:name="LIST OF ABBREVIATIONS AND ACRONYMS" text:style-name="Index_20_Link" text:visited-style-name="Index_20_Link">LIST OF ABBREVIATIONS AND ACRONYMS<text:tab/>iv</text:a></text:p>
          <text:p text:style-name="P45"><text:a xlink:type="simple" xlink:href="#__RefHeading___Toc4331_3468845459" office:name="ABSTRACT" text:style-name="Index_20_Link" text:visited-style-name="Index_20_Link">ABSTRACT<text:tab/>v</text:a></text:p>
          <text:p text:style-name="P45"><text:a xlink:type="simple" xlink:href="#__RefHeading___Toc4333_3468845459" office:name="TABLE OF CONTENTS" text:style-name="Index_20_Link" text:visited-style-name="Index_20_Link">TABLE OF CONTENTS<text:tab/>vi</text:a></text:p>
          <text:p text:style-name="P45"><text:a xlink:type="simple" xlink:href="#__RefHeading___Toc4335_3468845459" office:name="LIST OF TABLES" text:style-name="Index_20_Link" text:visited-style-name="Index_20_Link">LIST OF TABLES<text:tab/>ix</text:a></text:p>
          <text:p text:style-name="P45"><text:a xlink:type="simple" xlink:href="#__RefHeading___Toc4337_3468845459" office:name="LIST OF FIGURES" text:style-name="Index_20_Link" text:visited-style-name="Index_20_Link">LIST OF FIGURES<text:tab/>x</text:a></text:p>
          <text:p text:style-name="P45"><text:a xlink:type="simple" xlink:href="#__RefHeading___Toc4359_3468845459%20Copy%201" office:name="CHAPTER ONE: INTRODUCTION" text:style-name="Index_20_Link" text:visited-style-name="Index_20_Link">CHAPTER ONE: INTRODUCTION<text:tab/>1</text:a></text:p>
          <text:p text:style-name="P46"><text:a xlink:type="simple" xlink:href="#__RefHeading___Toc4341_3468845459" office:name="1.1 General Introduction" text:style-name="Index_20_Link" text:visited-style-name="Index_20_Link">1.1 General Introduction<text:tab/>1</text:a></text:p>
          <text:p text:style-name="P46"><text:a xlink:type="simple" xlink:href="#__RefHeading___Toc4343_3468845459" office:name="1.2 Statement of the Problem" text:style-name="Index_20_Link" text:visited-style-name="Index_20_Link">1.2 Statement of the Problem<text:tab/>1</text:a></text:p>
          <text:p text:style-name="P46"><text:a xlink:type="simple" xlink:href="#__RefHeading___Toc4345_3468845459" office:name="1.3 Objectives" text:style-name="Index_20_Link" text:visited-style-name="Index_20_Link">1.3 Objectives<text:tab/>2</text:a></text:p>
          <text:p text:style-name="P47"><text:a xlink:type="simple" xlink:href="#__RefHeading___Toc4347_3468845459" office:name="1.3.1 General Objective" text:style-name="Index_20_Link" text:visited-style-name="Index_20_Link">1.3.1 General Objective<text:tab/>2</text:a></text:p>
          <text:p text:style-name="P47"><text:a xlink:type="simple" xlink:href="#__RefHeading___Toc4349_3468845459" office:name="1.3.2 Specific Objectives" text:style-name="Index_20_Link" text:visited-style-name="Index_20_Link">1.3.2 Specific Objectives<text:tab/>2</text:a></text:p>
          <text:p text:style-name="P47"><text:a xlink:type="simple" xlink:href="#__RefHeading___Toc4351_3468845459" office:name="1.3.3 Value Proposition Canvas" text:style-name="Index_20_Link" text:visited-style-name="Index_20_Link">1.3.3 Value Proposition Canvas<text:tab/>3</text:a></text:p>
          <text:p text:style-name="P46"><text:a xlink:type="simple" xlink:href="#__RefHeading___Toc4353_3468845459" office:name="1.4 Research Questions" text:style-name="Index_20_Link" text:visited-style-name="Index_20_Link">1.4 Research Questions<text:tab/>4</text:a></text:p>
          <text:p text:style-name="P46"><text:a xlink:type="simple" xlink:href="#__RefHeading___Toc4355_3468845459" office:name="1.5 Significance of the Study" text:style-name="Index_20_Link" text:visited-style-name="Index_20_Link">1.5 Significance of the Study<text:tab/>5</text:a></text:p>
          <text:p text:style-name="P46"><text:a xlink:type="simple" xlink:href="#__RefHeading___Toc4357_3468845459" office:name="1.6 Structure of the Report" text:style-name="Index_20_Link" text:visited-style-name="Index_20_Link">1.6 Structure of the Report<text:tab/>5</text:a></text:p>
          <text:p text:style-name="P45"><text:a xlink:type="simple" xlink:href="#__RefHeading___Toc4359_3468845459" office:name="CHAPTER TWO: LITERATURE REVIEW" text:style-name="Index_20_Link" text:visited-style-name="Index_20_Link">CHAPTER TWO: LITERATURE REVIEW<text:tab/>6</text:a></text:p>
          <text:p text:style-name="P46"><text:a xlink:type="simple" xlink:href="#__RefHeading___Toc4361_3468845459" office:name="2.1 Introduction" text:style-name="Index_20_Link" text:visited-style-name="Index_20_Link">2.1 Introduction<text:tab/>6</text:a></text:p>
          <text:p text:style-name="P46"><text:a xlink:type="simple" xlink:href="#__RefHeading___Toc4363_3468845459" office:name="2.2 Related Studies" text:style-name="Index_20_Link" text:visited-style-name="Index_20_Link">2.2 Related Studies<text:tab/>6</text:a></text:p>
          <text:p text:style-name="P46"><text:a xlink:type="simple" xlink:href="#__RefHeading___Toc4373_3468845459" office:name="2.3 Research Gap" text:style-name="Index_20_Link" text:visited-style-name="Index_20_Link">2.3 Research Gap<text:tab/>9</text:a></text:p>
          <text:p text:style-name="P45"><text:a xlink:type="simple" xlink:href="#__RefHeading___Toc4375_3468845459" office:name="CHAPTER THREE: METHODOLOGY" text:style-name="Index_20_Link" text:visited-style-name="Index_20_Link">CHAPTER THREE: METHODOLOGY<text:tab/>10</text:a></text:p>
          <text:p text:style-name="P46"><text:a xlink:type="simple" xlink:href="#__RefHeading___Toc4377_3468845459" office:name="3.1 Introduction" text:style-name="Index_20_Link" text:visited-style-name="Index_20_Link">3.1 Introduction<text:tab/>10</text:a></text:p>
          <text:p text:style-name="P47"><text:a xlink:type="simple" xlink:href="#__RefHeading___Toc4381_3468845459" office:name="3.2.1 General Methodology" text:style-name="Index_20_Link" text:visited-style-name="Index_20_Link"><text:soft-page-break/>3.2.1 General Methodology<text:tab/>10</text:a></text:p>
          <text:p text:style-name="P47"><text:a xlink:type="simple" xlink:href="#__RefHeading___Toc4383_3468845459" office:name="3.2.2 Methodology for Gathering User Requirements" text:style-name="Index_20_Link" text:visited-style-name="Index_20_Link">3.2.2 Methodology for Gathering User Requirements<text:tab/>10</text:a></text:p>
          <text:p text:style-name="P47"><text:a xlink:type="simple" xlink:href="#__RefHeading___Toc4385_3468845459" office:name="3.2.3 Methodology for System Design" text:style-name="Index_20_Link" text:visited-style-name="Index_20_Link">3.2.3 Methodology for System Design<text:tab/>10</text:a></text:p>
          <text:p text:style-name="P47"><text:a xlink:type="simple" xlink:href="#__RefHeading___Toc2935_657679031" office:name="3.2.4 Methodology for System Implementation." text:style-name="Index_20_Link" text:visited-style-name="Index_20_Link">3.2.4 Methodology for System Implementation.<text:tab/>11</text:a></text:p>
          <text:p text:style-name="P47"><text:a xlink:type="simple" xlink:href="#__RefHeading___Toc4389_3468845459" office:name="3.2.5 Methodology for System Testing and Validation" text:style-name="Index_20_Link" text:visited-style-name="Index_20_Link">3.2.5 Methodology for System Testing and Validation<text:tab/>11</text:a></text:p>
          <text:p text:style-name="P46"><text:a xlink:type="simple" xlink:href="#__RefHeading___Toc4391_3468845459" office:name="3.3 Methodology Table" text:style-name="Index_20_Link" text:visited-style-name="Index_20_Link">3.3 Methodology Table<text:tab/>12</text:a></text:p>
          <text:p text:style-name="P45"><text:a xlink:type="simple" xlink:href="#__RefHeading___Toc4393_3468845459" office:name="CHAPTER FOUR: SYSTEM ANALYSIS AND DESIGN" text:style-name="Index_20_Link" text:visited-style-name="Index_20_Link">CHAPTER FOUR: SYSTEM ANALYSIS AND DESIGN<text:tab/>13</text:a></text:p>
          <text:p text:style-name="P46"><text:a xlink:type="simple" xlink:href="#__RefHeading___Toc4395_3468845459" office:name="4.1 Introduction" text:style-name="Index_20_Link" text:visited-style-name="Index_20_Link">4.1 Introduction<text:tab/>13</text:a></text:p>
          <text:p text:style-name="P46"><text:a xlink:type="simple" xlink:href="#__RefHeading___Toc4397_3468845459" office:name="4.2 Requirement Analysis" text:style-name="Index_20_Link" text:visited-style-name="Index_20_Link">4.2 Requirement Analysis<text:tab/>13</text:a></text:p>
          <text:p text:style-name="P47"><text:a xlink:type="simple" xlink:href="#__RefHeading___Toc4399_3468845459" office:name="4.2.1 System Requirements" text:style-name="Index_20_Link" text:visited-style-name="Index_20_Link">4.2.1 System Requirements<text:tab/>13</text:a></text:p>
          <text:p text:style-name="P48"><text:a xlink:type="simple" xlink:href="#__RefHeading___Toc4401_3468845459" office:name="4.2.1.1 Data Requirements" text:style-name="Index_20_Link" text:visited-style-name="Index_20_Link">4.2.1.1 Data Requirements<text:tab/>14</text:a></text:p>
          <text:p text:style-name="P48"><text:a xlink:type="simple" xlink:href="#__RefHeading___Toc4403_3468845459" office:name="4.2.1.2 Software Requirements" text:style-name="Index_20_Link" text:visited-style-name="Index_20_Link">4.2.1.2 Software Requirements<text:tab/>15</text:a></text:p>
          <text:p text:style-name="P48"><text:a xlink:type="simple" xlink:href="#__RefHeading___Toc4405_3468845459" office:name="4.2.1.3 Hardware Requirements" text:style-name="Index_20_Link" text:visited-style-name="Index_20_Link">4.2.1.3 Hardware Requirements<text:tab/>16</text:a></text:p>
          <text:p text:style-name="P48"><text:a xlink:type="simple" xlink:href="#__RefHeading___Toc4409_3468845459" office:name="4.2.2.1 Functional Requirements" text:style-name="Index_20_Link" text:visited-style-name="Index_20_Link">4.2.2.1 Functional Requirements<text:tab/>17</text:a></text:p>
          <text:p text:style-name="P48"><text:a xlink:type="simple" xlink:href="#__RefHeading___Toc4411_3468845459" office:name="4.2.2.2 Non Functional Requirements" text:style-name="Index_20_Link" text:visited-style-name="Index_20_Link">4.2.2.2 Non Functional Requirements<text:tab/>17</text:a></text:p>
          <text:p text:style-name="P46"><text:a xlink:type="simple" xlink:href="#__RefHeading___Toc4413_3468845459" office:name="4.3 System Design" text:style-name="Index_20_Link" text:visited-style-name="Index_20_Link">4.3 System Design<text:tab/>18</text:a></text:p>
          <text:p text:style-name="P47"><text:a xlink:type="simple" xlink:href="#__RefHeading___Toc4415_3468845459" office:name="4.3.1 System Architecture" text:style-name="Index_20_Link" text:visited-style-name="Index_20_Link">4.3.1 System Architecture<text:tab/>18</text:a></text:p>
          <text:p text:style-name="P45"><text:a xlink:type="simple" xlink:href="#__RefHeading___Toc4417_3468845459" office:name="CHAPTER FIVE: IMPLEMENTATION AND TESTING" text:style-name="Index_20_Link" text:visited-style-name="Index_20_Link">CHAPTER FIVE: IMPLEMENTATION AND TESTING<text:tab/>19</text:a></text:p>
          <text:p text:style-name="P46"><text:a xlink:type="simple" xlink:href="#__RefHeading___Toc4419_3468845459" office:name="5.1 Introduction" text:style-name="Index_20_Link" text:visited-style-name="Index_20_Link">5.1 Introduction<text:tab/>19</text:a></text:p>
          <text:p text:style-name="P46"><text:a xlink:type="simple" xlink:href="#__RefHeading___Toc4421_3468845459" office:name="5.2 Implementation" text:style-name="Index_20_Link" text:visited-style-name="Index_20_Link">5.2 Implementation<text:tab/>19</text:a></text:p>
          <text:p text:style-name="P47"><text:a xlink:type="simple" xlink:href="#__RefHeading___Toc4423_3468845459" office:name=" 5.2.1 Web Scraper" text:style-name="Index_20_Link" text:visited-style-name="Index_20_Link"><text:s/>5.2.1 Web Scraper<text:tab/>19</text:a></text:p>
          <text:p text:style-name="P47"><text:a xlink:type="simple" xlink:href="#__RefHeading___Toc4425_3468845459" office:name=" 5.2.2 Data Cleaning" text:style-name="Index_20_Link" text:visited-style-name="Index_20_Link"><text:s/>5.2.2 Data Cleaning<text:tab/>20</text:a></text:p>
          <text:p text:style-name="P47"><text:a xlink:type="simple" xlink:href="#__RefHeading___Toc4427_3468845459" office:name="5.2.3 Model Benchmarking" text:style-name="Index_20_Link" text:visited-style-name="Index_20_Link">5.2.3 Model Benchmarking<text:tab/>20</text:a></text:p>
          <text:p text:style-name="P47"><text:a xlink:type="simple" xlink:href="#__RefHeading___Toc4429_3468845459" office:name="5.2.4 Production Classifier" text:style-name="Index_20_Link" text:visited-style-name="Index_20_Link">5.2.4 Production Classifier<text:tab/>21</text:a></text:p>
          <text:p text:style-name="P47"><text:a xlink:type="simple" xlink:href="#__RefHeading___Toc4431_3468845459" office:name="5.2.5 Data Consolidation" text:style-name="Index_20_Link" text:visited-style-name="Index_20_Link">5.2.5 Data Consolidation<text:tab/>22</text:a></text:p>
          <text:p text:style-name="P47"><text:a xlink:type="simple" xlink:href="#__RefHeading___Toc4433_3468845459%20Copy%201" office:name="5.2.6 Visualisation and Analysis" text:style-name="Index_20_Link" text:visited-style-name="Index_20_Link"><text:soft-page-break/>5.2.6 Visualisation and Analysis<text:tab/>22</text:a></text:p>
          <text:p text:style-name="P46"><text:a xlink:type="simple" xlink:href="#__RefHeading___Toc4435_3468845459" office:name="5.3 Testing" text:style-name="Index_20_Link" text:visited-style-name="Index_20_Link">5.3 Testing<text:tab/>24</text:a></text:p>
          <text:p text:style-name="P47"><text:a xlink:type="simple" xlink:href="#__RefHeading___Toc2497_657679031" office:name="5.3 Testing" text:style-name="Index_20_Link" text:visited-style-name="Index_20_Link">5.3 Testing<text:tab/>24</text:a></text:p>
          <text:p text:style-name="P48"><text:a xlink:type="simple" xlink:href="#__RefHeading___Toc2499_657679031" office:name="5.3.1 Functional Testing" text:style-name="Index_20_Link" text:visited-style-name="Index_20_Link">5.3.1 Functional Testing<text:tab/>24</text:a></text:p>
          <text:p text:style-name="P48"><text:a xlink:type="simple" xlink:href="#__RefHeading___Toc2501_657679031" office:name="5.3.2 Benchmark Testing" text:style-name="Index_20_Link" text:visited-style-name="Index_20_Link">5.3.2 Benchmark Testing<text:tab/>25</text:a></text:p>
          <text:p text:style-name="P47"><text:a xlink:type="simple" xlink:href="#__RefHeading___Toc4441_3468845459" office:name="5.3.3 Statistical Validation" text:style-name="Index_20_Link" text:visited-style-name="Index_20_Link">5.3.3 Statistical Validation<text:tab/>25</text:a></text:p>
          <text:p text:style-name="P45"><text:a xlink:type="simple" xlink:href="#__RefHeading___Toc4443_3468845459" office:name="CHAPTER SIX: CONCLUSION AND RECOMMENDATION" text:style-name="Index_20_Link" text:visited-style-name="Index_20_Link">CHAPTER SIX: CONCLUSION AND RECOMMENDATION<text:tab/>27</text:a></text:p>
          <text:p text:style-name="P46"><text:a xlink:type="simple" xlink:href="#__RefHeading___Toc4445_3468845459" office:name="6.1 Introduction" text:style-name="Index_20_Link" text:visited-style-name="Index_20_Link">6.1 Introduction<text:tab/>27</text:a></text:p>
          <text:p text:style-name="P46"><text:a xlink:type="simple" xlink:href="#__RefHeading___Toc4447_3468845459" office:name="6.2 Conclusion" text:style-name="Index_20_Link" text:visited-style-name="Index_20_Link">6.2 Conclusion<text:tab/>27</text:a></text:p>
          <text:p text:style-name="P47"><text:a xlink:type="simple" xlink:href="#__RefHeading___Toc4449_3468845459" office:name="6.2.1 Classification Objective" text:style-name="Index_20_Link" text:visited-style-name="Index_20_Link">6.2.1 Classification Objective<text:tab/>27</text:a></text:p>
          <text:p text:style-name="P47"><text:a xlink:type="simple" xlink:href="#__RefHeading___Toc4451_3468845459" office:name="6.2.2 Monthly Aggregation Objective" text:style-name="Index_20_Link" text:visited-style-name="Index_20_Link">6.2.2 Monthly Aggregation Objective<text:tab/>27</text:a></text:p>
          <text:p text:style-name="P47"><text:a xlink:type="simple" xlink:href="#__RefHeading___Toc4453_3468845459" office:name="6.2.3 Correlation Objective" text:style-name="Index_20_Link" text:visited-style-name="Index_20_Link">6.2.3 Correlation Objective<text:tab/>27</text:a></text:p>
          <text:p text:style-name="P47"><text:a xlink:type="simple" xlink:href="#__RefHeading___Toc4455_3468845459" office:name="6.2.4 Visualisation Objective" text:style-name="Index_20_Link" text:visited-style-name="Index_20_Link">6.2.4 Visualisation Objective<text:tab/>27</text:a></text:p>
          <text:p text:style-name="P47"><text:a xlink:type="simple" xlink:href="#__RefHeading___Toc4457_3468845459" office:name="6.2.5 Model Evaluation Objective" text:style-name="Index_20_Link" text:visited-style-name="Index_20_Link">6.2.5 Model Evaluation Objective<text:tab/>28</text:a></text:p>
          <text:p text:style-name="P46"><text:a xlink:type="simple" xlink:href="#__RefHeading___Toc4459_3468845459" office:name="6.3 Challenges and Limitations" text:style-name="Index_20_Link" text:visited-style-name="Index_20_Link">6.3 Challenges and Limitations<text:tab/>28</text:a></text:p>
          <text:p text:style-name="P46"><text:a xlink:type="simple" xlink:href="#__RefHeading___Toc4461_3468845459" office:name="6.4 Recommendations" text:style-name="Index_20_Link" text:visited-style-name="Index_20_Link">6.4 Recommendations<text:tab/>28</text:a></text:p>
          <text:p text:style-name="P45"><text:a xlink:type="simple" xlink:href="#__RefHeading___Toc4463_3468845459" office:name="REFERENCES" text:style-name="Index_20_Link" text:visited-style-name="Index_20_Link">REFERENCES<text:tab/>29</text:a></text:p>
          <text:p text:style-name="P45"><text:a xlink:type="simple" xlink:href="#__RefHeading___Toc4465_3468845459" office:name="APPENDIX" text:style-name="Index_20_Link" text:visited-style-name="Index_20_Link">APPENDIX<text:tab/>31</text:a></text:p>
        </text:index-body>
      </text:table-of-content>
      <text:p text:style-name="P37"/>
      <text:h text:style-name="P38" text:outline-level="1"><text:bookmark-start text:name="__RefHeading___Toc4335_3468845459"/>LIST OF TABLES<text:bookmark-end text:name="__RefHeading___Toc4335_3468845459"/></text:h>
      <text:p text:style-name="P17">Table 1.1: Value Proposition Canvas for EF-02</text:p>
      <text:p text:style-name="P17">Table 3.1: Methodology Table</text:p>
      <text:p text:style-name="P17">Table 5.1: Model Benchmarking Results</text:p>
      <text:p text:style-name="P17">Table 5.2: Functional Testing Results</text:p>
      <text:p text:style-name="P17">Table 5.3: Pearson Correlation Results</text:p>
      <text:p text:style-name="P37"/>
      <text:h text:style-name="P38" text:outline-level="1"><text:bookmark-start text:name="__RefHeading___Toc4337_3468845459"/>LIST OF FIGURES<text:bookmark-end text:name="__RefHeading___Toc4337_3468845459"/></text:h>
      <text:p text:style-name="P49">Figure <text:span text:style-name="T32">1</text:span>.1: Value Proposition Canvas</text:p>
      <text:p text:style-name="P17">Figure 5.1: Headline relevance split</text:p>
      <text:p text:style-name="P17">Figure 5.2: Monthly sentiment distribution</text:p>
      <text:p text:style-name="P17">Figure 5.3: Positive and Negative sentiment versus USD/TZS exchange rate</text:p>
      <text:p text:style-name="P50">Figure 5.4: Pearson correlation matrix</text:p>
      <text:h text:style-name="P51" text:outline-level="1"><text:bookmark-start text:name="__RefHeading___Toc4359_3468845459 Copy 1"/>CHAPTER <text:span text:style-name="T33">ONE</text:span>: <text:span text:style-name="T33">INTRODUCTION</text:span><text:bookmark-end text:name="__RefHeading___Toc4359_3468845459 Copy 1"/></text:h>
      <text:h text:style-name="P52" text:outline-level="2"><text:bookmark-start text:name="__RefHeading___Toc4341_3468845459"/>1.1 General Introduction<text:bookmark-end text:name="__RefHeading___Toc4341_3468845459"/></text:h>
      <text:p text:style-name="P17">Sentiment analysis, also called opinion mining, is a branch of Natural Language Processing (NLP) that identifies subjective information in text. In finance, researchers study whether the tone of news, reports, and social media can help explain or predict economic behaviour. Loughran and McDonald (2011) showed that general purpose sentiment dictionaries perform poorly on financial text because many words carry special meanings in economics. Baker, Bloom, and Davis (2016) built an Economic Policy Uncertainty index partly from newspaper tone, which is now used in many countries.</text:p>
      <text:p text:style-name="P17">In Tanzania, English language outlets such as Daily News and The Citizen publish regular business and financial news covering monetary policy, banking, trade, agriculture, energy, and foreign exchange. Despite this rich media output, computational analysis of Tanzanian financial news remains limited. Adelani et al. (2021) noted that African language and domain NLP resources are underdeveloped. This project applies data science methods to Tanzanian financial headlines from 2022 to 2024 and tests whether monthly sentiment patterns relate to official macroeconomic indicators published by the Bank of Tanzania and the National Bureau of Statistics.</text:p>
      <text:h text:style-name="P52" text:outline-level="2"><text:bookmark-start text:name="__RefHeading___Toc4343_3468845459"/>1.2 Statement of the Problem<text:bookmark-end text:name="__RefHeading___Toc4343_3468845459"/></text:h>
      <text:p text:style-name="P17">Financial news shapes how the public, investors, and policymakers understand the economy. Headlines about currency weakness, inflation, or banking performance can influence expectations even before official statistics are released. In Tanzania, this information exists in large volumes online, but it is mostly unstructured text.</text:p>
      <text:p text:style-name="P17">Existing sentiment research focuses on Western markets and tools trained on Western financial language. Rule based models and even FinBERT struggle with Tanzanian economic phrasing. There is also no published study that correlates Tanzanian financial media sentiment with BOT reported inflation and the USD/TZS exchange rate over a multi year period.</text:p>
      <text:p text:style-name="P17">This project addresses the gap by building a reproducible pipeline that scrapes local news, classifies headlines using a large language model, merges results with official economic data, and tests statistical relationships through correlation analysis and visualisation.</text:p>
      <text:h text:style-name="P52" text:outline-level="2"><text:bookmark-start text:name="__RefHeading___Toc4345_3468845459"/><text:soft-page-break/>1.3 Objectives<text:bookmark-end text:name="__RefHeading___Toc4345_3468845459"/></text:h>
      <text:h text:style-name="P53" text:outline-level="3"><text:bookmark-start text:name="__RefHeading___Toc4347_3468845459"/>1.3.1 General Objective<text:bookmark-end text:name="__RefHeading___Toc4347_3468845459"/></text:h>
      <text:p text:style-name="P54">The general objective of this project is to investigate whether sentiment expressed in Tanzanian financial news media is meaningfully correlated with movements in the USD/TZS exchange rate and CPI inflation over the period 2022 to 2024.</text:p>
      <text:p text:style-name="P54"/>
      <text:h text:style-name="P55" text:outline-level="3"><text:bookmark-start text:name="__RefHeading___Toc4349_3468845459"/>1.3.2 Specific Objectives<text:bookmark-end text:name="__RefHeading___Toc4349_3468845459"/></text:h>
      <text:list text:style-name="L1">
        <text:list-item>
          <text:p text:style-name="P56">To apply a <text:span text:style-name="T34">pre-trianed NLP model to</text:span> financial news headlines by topic category and economic sentiment label.</text:p>
        </text:list-item>
        <text:list-item>
          <text:p text:style-name="P56">To compute monthly average sentiment scores aggregated from the labelled headline dataset across the study period.</text:p>
        </text:list-item>
        <text:list-item>
          <text:p text:style-name="P56">To correlate monthly sentiment scores with NBS published CPI inflation and USD/TZS exchange rate data using Pearson correlation.</text:p>
        </text:list-item>
        <text:list-item>
          <text:p text:style-name="P56">To visualise the relationship between media sentiment trends and macroeconomic movements through time series plots and correlation charts.</text:p>
        </text:list-item>
        <text:list-item>
          <text:p text:style-name="P57">To evaluate the performance and suitability of NLP approaches, including rule based tools, FinBERT, and LLMs, for Tanzanian financial text.</text:p>
        </text:list-item>
      </text:list>
      <text:h text:style-name="P53" text:outline-level="3"/>
      <text:h text:style-name="P58" text:outline-level="3"><text:bookmark-start text:name="__RefHeading___Toc4351_3468845459"/>1.3.3 Value Proposition Canvas<text:bookmark-end text:name="__RefHeading___Toc4351_3468845459"/></text:h>
      <text:p text:style-name="P17">A Value Proposition Canvas (VPC) is a tool that links what users need with what a product offers. It helps clarify who benefits from a system and why it matters. For EF-02, the canvas below maps stakeholders, their problems, desired outcomes, and the project deliverables.</text:p>
      <text:p text:style-name="P17"/>
      <text:p text:style-name="P59"><draw:frame draw:style-name="fr2" draw:name="Image2" text:anchor-type="char" svg:width="6.6181in" svg:height="3.6575in" draw:z-index="3"><draw:image xlink:href="Pictures/100000000000078000000438D65192C3.png" xlink:type="simple" xlink:show="embed" xlink:actuate="onLoad" draw:mime-type="image/png"/></draw:frame><text:span text:style-name="T35">Figure </text:span><text:span text:style-name="T36">1</text:span><text:span text:style-name="T35">.1: Value proposition canvas </text:span><text:span text:style-name="T37">FOR</text:span><text:span text:style-name="T35"> EF-02</text:span></text:p>
      <text:p text:style-name="P60"/>
      <text:p text:style-name="P61"><text:span text:style-name="T38">The value proposition: </text:span>addresses these needs through a six-notebook pipeline powered by a pre-trained Ollama LLM classifier and a dataset of over 4,000 Tanzanian financial news entries (2022–24) as detailed in<text:span text:style-name="T39"> </text:span><text:span text:style-name="T40">Figure 1.1</text:span><text:span text:style-name="T41">.</text:span> This system acts as a pain reliever by utilizing local news sources tuned for economic outcomes, which eliminates manual cross-checking and filters out slanted media bias. Additionally, it serves as a gain creator by delivering interactive charts, tone dashboards, and correlation tables that map monthly sentiment scores directly to inflation and forex charts, providing a highly replicable framework for East African financial NLP. </text:p>
      <text:p text:style-name="P62"><text:soft-page-break/><text:span text:style-name="T42">The customer segment:</text:span> comprises policymakers, economists, investors, researchers, and data science students who need to track currency pressure and inflation trends ahead of official data releases. These users seek to predict economic trends, validate market views, and save time by monitoring multiple media sources simultaneously. Currently, they are hindered by delayed official statistics, unstructured news data, and Western-biased NLP tools. To overcome these pains, they require clear links between media sentiment and macro indicators, expecting comprehensive dashboards that track sentiment trends over time to improve financial literac<text:span text:style-name="T32">y</text:span></text:p>
      <text:p text:style-name="P62"/>
      <text:h text:style-name="P63" text:outline-level="2"><text:bookmark-start text:name="__RefHeading___Toc4353_3468845459"/>1.4 Research Questions<text:bookmark-end text:name="__RefHeading___Toc4353_3468845459"/></text:h>
      <text:p text:style-name="P64">RQ1: Can a large language model accurately classify Tanzanian financial headlines by topic and economic sentiment?</text:p>
      <text:p text:style-name="P64">RQ2: Do monthly sentiment scores show a statistical relationship with the USD/TZS exchange rate?</text:p>
      <text:p text:style-name="P64">RQ3: Do monthly sentiment scores show a statistical relationship with CPI inflation?</text:p>
      <text:p text:style-name="P64">RQ4: Which NLP approach performs best on Tanzanian financial text compared to rule based and transformer models?</text:p>
      <text:p text:style-name="P64">RQ5: What limitations affect the reliability of the sentiment signal in this study?</text:p>
      <text:p text:style-name="P65"/>
      <text:h text:style-name="P66" text:outline-level="2"/>
      <text:h text:style-name="P67" text:outline-level="2"><text:bookmark-start text:name="__RefHeading___Toc4355_3468845459"/>1.5 Significance of the Study<text:bookmark-end text:name="__RefHeading___Toc4355_3468845459"/></text:h>
      <text:p text:style-name="P65">Upon completing this study, the following benefits are expected:</text:p>
      <text:list text:style-name="L2">
        <text:list-item>
          <text:p text:style-name="P68">It contributes local evidence on whether financial media sentiment relates to Tanzanian macro indicators.</text:p>
        </text:list-item>
        <text:list-item>
          <text:p text:style-name="P68"><text:span text:style-name="T43">I</text:span>t demonstrates a practical data science pipeline that students and researchers can extend to other sectors.</text:p>
        </text:list-item>
        <text:list-item>
          <text:p text:style-name="P68">It highlights the need for African context NLP tools rather than relying only on Western trained models.</text:p>
        </text:list-item>
        <text:list-item>
          <text:p text:style-name="P68">It supports early awareness of currency and inflation trends for academic and policy discussion.</text:p>
        </text:list-item>
        <text:list-item>
          <text:p text:style-name="P68"><text:span text:style-name="T43">I</text:span>t builds skills in scraping, prompt engineering, time series analysis, and visualisation.</text:p>
          <text:p text:style-name="P68"/>
        </text:list-item>
      </text:list>
      <text:h text:style-name="P63" text:outline-level="2"><text:bookmark-start text:name="__RefHeading___Toc4357_3468845459"/>1.6 Structure of the Report<text:bookmark-end text:name="__RefHeading___Toc4357_3468845459"/></text:h>
      <text:list text:style-name="L3">
        <text:list-item>
          <text:p text:style-name="P69">Chapter One introduces the problem, objectives, research questions, and significance. </text:p>
        </text:list-item>
        <text:list-item>
          <text:p text:style-name="P69">Chapter Two reviews related literature and identifies the research gap. </text:p>
        </text:list-item>
        <text:list-item>
          <text:p text:style-name="P69">Chapter Three explains the methodology and tools used. </text:p>
        </text:list-item>
        <text:list-item>
          <text:p text:style-name="P69">Chapter Four presents system requirements and architecture. </text:p>
        </text:list-item>
        <text:list-item>
          <text:p text:style-name="P69">Chapter Five describes implementation, results, and testing. </text:p>
        </text:list-item>
        <text:list-item>
          <text:p text:style-name="P69">Chapter Six provides conclusions, limitations, and recommendations.<text:tab/></text:p>
        </text:list-item>
      </text:list>
      <text:h text:style-name="P38" text:outline-level="1"><text:bookmark-start text:name="__RefHeading___Toc4359_3468845459"/>CHAPTER TWO: LITERATURE REVIEW<text:bookmark-end text:name="__RefHeading___Toc4359_3468845459"/></text:h>
      <text:h text:style-name="P52" text:outline-level="2"><text:bookmark-start text:name="__RefHeading___Toc4361_3468845459"/>2.1 Introduction<text:bookmark-end text:name="__RefHeading___Toc4361_3468845459"/></text:h>
      <text:p text:style-name="P70">A literature review surveys existing research to show what is already known about a topic and where gaps remain. It helps justify the methods chosen and positions this project within academic discourse. This chapter reviews studies on financial sentiment analysis, NLP methods, links between media tone and macroeconomic indicators, and research in the African context.</text:p>
      <text:h text:style-name="P52" text:outline-level="2"><text:bookmark-start text:name="__RefHeading___Toc4363_3468845459"/>2.2 Related Studies<text:bookmark-end text:name="__RefHeading___Toc4363_3468845459"/></text:h>
      <text:p text:style-name="P71"><text:span text:style-name="Strong_20_Emphasis"><text:span text:style-name="T44">2.2.1 Finance-Specific Sentiment Lexicon </text:span></text:span><text:span text:style-name="Strong_20_Emphasis"><text:span text:style-name="T45">(</text:span></text:span><text:span text:style-name="Strong_20_Emphasis"><text:span text:style-name="T44">Loughran and McDonald, 2011)</text:span></text:span></text:p>
      <text:p text:style-name="P72">Loughran and McDonald (2011) argued that using general-purpose dictionaries to analyse financial text produces unreliable results. Words like "liability" or "risk" carry negative connotations in everyday language but are routine and neutral in financial reporting. To address this, they built a sentiment lexicon designed specifically for financial documents. Their work showed that domain-specific vocabulary matters a great deal when classifying tone in financial text, and it remains one of the most widely referenced resources in financial NLP. For EF-02, this study reinforces the importance of being careful about how sentiment labels are assigned to Tanzanian financial headlines, where general tools may similarly misread local financial language.</text:p>
      <text:p text:style-name="P73"><text:span text:style-name="Strong_20_Emphasis"><text:span text:style-name="T44"/></text:span></text:p>
      <text:p text:style-name="P74"><text:span text:style-name="Strong_20_Emphasis"><text:span text:style-name="T44">2.2.2 Media Tone and Stock Market Returns </text:span></text:span><text:span text:style-name="Strong_20_Emphasis"><text:span text:style-name="T45">(Tetlock, 2007)</text:span></text:span></text:p>
      <text:p text:style-name="P72">Tetlock (2007) took a column from the Wall Street Journal and measured the tone of its language over time. He found that when the column was more pessimistic than usual, stock prices tended to fall the following day. This was an early and influential demonstration that media sentiment is not just background noise it carries real information that markets respond to. The study helped establish media tone as a legitimate variable in financial analysis, which is a core assumption that EF-02 builds on when treating Tanzanian news headlines as signals worth measuring.</text:p>
      <text:p text:style-name="P73"><text:span text:style-name="Strong_20_Emphasis"><text:span text:style-name="T44"/></text:span></text:p>
      <text:p text:style-name="P74"><text:span text:style-name="Strong_20_Emphasis"><text:span text:style-name="T44"/></text:span></text:p>
      <text:p text:style-name="P75"><text:span text:style-name="Strong_20_Emphasis"><text:span text:style-name="T44">2.2.3 <text:s/>Public Mood and Market Movement </text:span></text:span><text:span text:style-name="Strong_20_Emphasis"><text:span text:style-name="T45">(</text:span></text:span><text:span text:style-name="Strong_20_Emphasis"><text:span text:style-name="T44">Bollen, Mao and Zeng, 2011)</text:span></text:span></text:p>
      <text:p text:style-name="P76">Bollen, Mao, and Zeng (2011) moved the conversation from traditional media to social media. They collected Twitter data and used a psychological mood measurement tool called POMS to track the emotional state of the public over time. Their finding was that a specific mood dimension calmness preceded movements in the Dow Jones Industrial Average by two to six days. This study broadened the idea that sentiment does not have to come from formal financial reporting to be useful, and it showed that collective public mood can be a leading indicator of market behaviour.</text:p>
      <text:p text:style-name="P74"><text:span text:style-name="Strong_20_Emphasis"><text:span text:style-name="T44"/></text:span></text:p>
      <text:p text:style-name="P74"><text:span text:style-name="Strong_20_Emphasis"><text:span text:style-name="T44">2.2.4 BERT and Contextual Language Understanding </text:span></text:span><text:span text:style-name="Strong_20_Emphasis"><text:span text:style-name="T45">(Devlin et al. 2018) </text:span></text:span></text:p>
      <text:p text:style-name="P72">Devlin et al. (2018) introduced BERT, a transformer-based language model that reads text in both directions simultaneously, giving it a much stronger understanding of context than earlier tools. Before BERT, most NLP models read text left to right and struggled with sentences where meaning depended on words that came later. BERT changed this and became the foundation for nearly all modern NLP work that followed. It is directly relevant to EF-02 because the models used in this project, including FinBERT and Llama 3, are built on the same transformer architecture that BERT established.</text:p>
      <text:p text:style-name="P73"><text:span text:style-name="Strong_20_Emphasis"><text:span text:style-name="T44"/></text:span></text:p>
      <text:p text:style-name="P74"><text:span text:style-name="Strong_20_Emphasis"><text:span text:style-name="T44">2.2.5 FinBERT and Domain-Specific Fine-Tuning </text:span></text:span><text:span text:style-name="Strong_20_Emphasis"><text:span text:style-name="T45">(Araci, 2019)</text:span></text:span></text:p>
      <text:p text:style-name="P72">Araci (2019) took BERT and fine-tuned it on financial text to create FinBERT. The motivation was straightforward: a general language model trained on broad internet data may not perform well on the specific vocabulary and structure of financial reporting. By training on financial corpora, FinBERT outperformed general sentiment tools on financial benchmarks by a meaningful margin. This study makes a clear case that domain-specific training improves classification quality, which is a principle EF-02 applies when using an instruction-tuned LLM with a finance-focused prompt rather than a generic sentiment classifier.</text:p>
      <text:p text:style-name="P73"><text:span text:style-name="Strong_20_Emphasis"><text:span text:style-name="T44"/></text:span></text:p>
      <text:p text:style-name="P73"><text:span text:style-name="Strong_20_Emphasis"><text:span text:style-name="T44"/></text:span></text:p>
      <text:p text:style-name="P75"><text:span text:style-name="Strong_20_Emphasis"><text:span text:style-name="T44">2.2.6 News </text:span></text:span><text:span text:style-name="Strong_20_Emphasis"><text:span text:style-name="T45">tone</text:span></text:span><text:span text:style-name="Strong_20_Emphasis"><text:span text:style-name="T44"> as a Macroeconomic Indicator </text:span></text:span><text:span text:style-name="Strong_20_Emphasis"><text:span text:style-name="T45">(Shapiro, Sudhof, and Wilson, 2022)</text:span></text:span></text:p>
      <text:p text:style-name="P72">Shapiro, Sudhof, and Wilson (2022) built a monthly sentiment index by processing thousands of newspaper articles and tracking how the tone of coverage changed over time. They found that this index had predictive power for macroeconomic outcomes including GDP growth and unemployment in the United States. This is the study that sits closest to what EF-02 is attempting. Where Shapiro et al. worked at scale with US data, EF-02 applies a similar logic to a much smaller and less studied context tracking whether the tone of Tanzanian financial news aligns with movements in local indicators like CPI and the TZS/USD exchange rate.</text:p>
      <text:p text:style-name="P73"><text:span text:style-name="Strong_20_Emphasis"><text:span text:style-name="T44"/></text:span></text:p>
      <text:p text:style-name="P74"><text:span text:style-name="Strong_20_Emphasis"><text:span text:style-name="T44">2.2.7 Financial News Sentiment in Kenya </text:span></text:span><text:span text:style-name="Strong_20_Emphasis"><text:span text:style-name="T45">(Muriungi and Kimani, 2020)</text:span></text:span></text:p>
      <text:p text:style-name="P72">Muriungi and Kimani (2020) conducted a sentiment analysis of Kenyan financial news and found a moderate correlation between media tone and the KES/USD exchange rate. This is the most geographically relevant study in this review, as Kenya shares many economic and media characteristics with Tanzania. Their findings suggest that the relationship between news sentiment and currency movement is detectable even in East African markets with limited data availability. EF-02 is partly motivated by the absence of an equivalent study for Tanzania, and Muriungi and Kimani's work provides a useful regional benchmark against which EF-02's findings can eventually be compared.</text:p>
      <text:p text:style-name="P73"><text:span text:style-name="Strong_20_Emphasis"><text:span text:style-name="T44"/></text:span></text:p>
      <text:p text:style-name="P74"><text:span text:style-name="Strong_20_Emphasis"><text:span text:style-name="T44">2.2.8 NLP Resource Gaps in African Languages </text:span></text:span><text:span text:style-name="Strong_20_Emphasis"><text:span text:style-name="T45">(</text:span></text:span><text:span text:style-name="Strong_20_Emphasis"><text:span text:style-name="T44">Adelani et al. 2021)</text:span></text:span></text:p>
      <text:p text:style-name="P72">Adelani et al. (2021) documented how severely underrepresented African languages and contexts are in NLP research. Datasets, benchmarks, and pre-trained models are overwhelmingly built around English and a small number of high-resource languages, leaving African researchers with tools that were not designed for their data. While EF-02 operates primarily in English, it works with Tanzanian sources, local institutions, and economic indicators that mainstream NLP tools were not built with in mind. Adelani et al.'s work frames exactly the kind of gap that projects like EF-02 begin to address, even in a small way.</text:p>
      <text:p text:style-name="P77"/>
      <text:h text:style-name="P52" text:outline-level="2"><text:bookmark-start text:name="__RefHeading___Toc4373_3468845459"/><text:soft-page-break/>2.3 Research Gap<text:bookmark-end text:name="__RefHeading___Toc4373_3468845459"/></text:h>
      <text:p text:style-name="P17">The literature review reveals four main gaps that EF-02 addresses:</text:p>
      <text:list text:style-name="L4">
        <text:list-item>
          <text:p text:style-name="P78">Most sentiment analysis research in finance has been conducted using data from developed markets, particularly the United States and Western Europe. There is very little equivalent work done using African financial news as the primary data source. </text:p>
        </text:list-item>
        <text:list-item>
          <text:p text:style-name="P78">The only East African study in this review is Muriungi and Kimani (2020), and that focuses on Kenya. Tanzania has not been the subject of a comparable study despite having its own distinct financial media landscape and macroeconomic environment. </text:p>
        </text:list-item>
        <text:list-item>
          <text:p text:style-name="P79">No fine-tuned language model exists for Tanzanian or East African financial text. Projects like EF-02 must rely on general instruction-tuned LLMs with carefully constructed prompts as a substitute for true domain adaptation.</text:p>
        </text:list-item>
        <text:list-item>
          <text:p text:style-name="P80">Lexicons such as the one developed by Loughran and McDonald (2011) were built using American financial documents. Their applicability to Tanzanian financial reporting, which reflects different institutions and terminology, has not been tested. </text:p>
        </text:list-item>
        <text:list-item>
          <text:p text:style-name="P80">There are no publicly available labelled datasets of Tanzanian financial headlines that could be used to train or evaluate a classifier, which Adelani et al. (2021) would recognise as consistent with the broader African NLP resource gap. </text:p>
        </text:list-item>
        <text:list-item>
          <text:p text:style-name="P80"><text:span text:style-name="T46">T</text:span>he TZS/USD pair has not been analysed through a media sentiment lens despite Tanzania's dependence on imports and foreign currency flows, leaving a clear gap in the local economic literature. . </text:p>
        </text:list-item>
      </text:list>
      <text:h text:style-name="P38" text:outline-level="1"><text:bookmark-start text:name="__RefHeading___Toc4375_3468845459"/>CHAPTER THREE: METHODOLOGY<text:bookmark-end text:name="__RefHeading___Toc4375_3468845459"/></text:h>
      <text:h text:style-name="P52" text:outline-level="2"><text:bookmark-start text:name="__RefHeading___Toc4377_3468845459"/>3.1 Introduction<text:bookmark-end text:name="__RefHeading___Toc4377_3468845459"/></text:h>
      <text:p text:style-name="P81">This chapter outlines the methodology used to design, implement, and validate the project's financial NLP pipeline. It explains the process of gathering requirements, preparing the headline dataset, and developing the system architecture. The following sections detail the technical deployment of the sentiment classifier and its correlation with macroeconomic indicators. </text:p>
      <text:h text:style-name="P53" text:outline-level="3"><text:bookmark-start text:name="__RefHeading___Toc4381_3468845459"/>3.2.1 General Methodology<text:bookmark-end text:name="__RefHeading___Toc4381_3468845459"/></text:h>
      <text:p text:style-name="P17">The project followed CRISP-DM (Cross Industry Standard Process for Data Mining), adapted with an iterative rebuild approach. CRISP-DM covers business understanding, data understanding, data preparation, modelling, evaluation, and deployment. This life cycle fits a pipeline that moves from raw news text to labelled data, merged monthly series, and visual insights. The team first benchmarked models on sample data, then scraped full headlines, then ran production classification, as recorded in the project decision log.</text:p>
      <text:h text:style-name="P53" text:outline-level="3"><text:bookmark-start text:name="__RefHeading___Toc4383_3468845459"/>3.2.2 Methodology for Gathering User Requirements<text:bookmark-end text:name="__RefHeading___Toc4383_3468845459"/></text:h>
      <text:p text:style-name="P17">Requirements were gathered through literature review, inspection of Tanzanian news websites, and comparison of data availability. Daily News and The Citizen were selected because they cover 2022 to 2024 and allow requests based scraping. IPP Media was excluded because its archive lacked full range coverage. <text:span text:style-name="T47">Other local news outlets lacked publicly available archives for news headlines in that period.</text:span></text:p>
      <text:h text:style-name="P53" text:outline-level="3"><text:bookmark-start text:name="__RefHeading___Toc4385_3468845459"/>3.2.3 Methodology for System Design<text:bookmark-end text:name="__RefHeading___Toc4385_3468845459"/></text:h>
      <text:p text:style-name="P82">The system was developed as a modular notebook-based pipeline with clear inputs and outputs at each stage. Each notebook performs a specific task, including scraping, cleaning, benchmarking, classification, consolidation, and visualization. This modular structure improves maintainability and preserves data integrity. The final notebook acts as the complete project output, combining results from all previous stages into a single summary and presenting the overall findings of the workflow. </text:p>
      <text:h text:style-name="Heading_20_3" text:outline-level="3"><text:bookmark-start text:name="__RefHeading___Toc2935_657679031"/><text:soft-page-break/><text:span text:style-name="T48">3.2.4 Methodology for System Implementation</text:span><text:span text:style-name="T49">.</text:span><text:bookmark-end text:name="__RefHeading___Toc2935_657679031"/></text:h>
      <text:p text:style-name="P83">The system was implemented using Python and Jupyter Notebook due to their suitability for data science workflows and ease of experimentation. Python was selected because of its extensive ecosystem of libraries <text:span text:style-name="T30">for our workflow. </text:span>Libraries such as <text:span text:style-name="Source_20_Text"><text:span text:style-name="T29">requests</text:span></text:span> and <text:span text:style-name="Source_20_Text"><text:span text:style-name="T29">BeautifulSoup</text:span></text:span> were used for web scraping, <text:span text:style-name="Source_20_Text"><text:span text:style-name="T29">pandas</text:span></text:span> for data cleaning and consolidation, <text:span text:style-name="Source_20_Text"><text:span text:style-name="T29">openai</text:span></text:span> and <text:span text:style-name="Source_20_Text"><text:span text:style-name="T29">groq</text:span></text:span> SDKs for sentiment classification, and <text:span text:style-name="Source_20_Text"><text:span text:style-name="T29">matplotlib</text:span></text:span> for visual analysis. Jupyter Notebook was chosen to structure the project into sequential modules <text:span text:style-name="T30">and provide a proper virtual environment for testing</text:span>, allowing each phase benchmarking, scraping, cleaning, classification, consolidation, and visualization to be developed, tested, and executed independently while maintaining a clear and reproducible workflow.</text:p>
      <text:h text:style-name="P53" text:outline-level="3"><text:bookmark-start text:name="__RefHeading___Toc4389_3468845459"/>3.2.5 Methodology for System Testing and Validation<text:bookmark-end text:name="__RefHeading___Toc4389_3468845459"/></text:h>
      <text:p text:style-name="P17">The system was tested and validated using benchmark testing and output validation methodologies. Benchmark testing was used to evaluate the performance of different sentiment classification models by comparing their predictions against labelled sample data to determine the most accurate approach. Output validation was applied throughout the pipeline to verify that generated outputs matched expected formats and conditions, such as correct label values, batch completeness, and successful data merging. These methodologies were selected to ensure the system produced reliable results, maintained data quality across all processing stages, and selected the most suitable model before deployment on the full dataset. </text:p>
      <text:h text:style-name="P52" text:outline-level="2"/>
      <text:h text:style-name="P84" text:outline-level="2"><text:bookmark-start text:name="__RefHeading___Toc4391_3468845459"/>3.3 Methodology Table<text:bookmark-end text:name="__RefHeading___Toc4391_3468845459"/></text:h>
      <text:p text:style-name="P85">Table 3.1: Methodology Table</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86"/>
            <text:p text:style-name="P86">Specific Objective</text:p>
          </table:table-cell>
          <table:table-cell table:style-name="Table4.B1" office:value-type="string">
            <text:p text:style-name="P87"/>
            <text:p text:style-name="P87">Methodology</text:p>
          </table:table-cell>
          <table:table-cell table:style-name="Table4.C1" office:value-type="string">
            <text:p text:style-name="P87"/>
            <text:p text:style-name="P87">Tools</text:p>
          </table:table-cell>
          <table:table-cell table:style-name="Table4.D1" office:value-type="string">
            <text:p text:style-name="P87"/>
            <text:p text:style-name="P87">Deliverable</text:p>
          </table:table-cell>
        </table:table-row>
        <table:table-row table:style-name="Table4.1">
          <table:table-cell table:style-name="Table4.A2" office:value-type="string">
            <text:p text:style-name="P88"/>
            <text:p text:style-name="P88">Gather financial news headlines</text:p>
          </table:table-cell>
          <table:table-cell table:style-name="Table4.B2" office:value-type="string">
            <text:p text:style-name="P88"/>
            <text:p text:style-name="P88">Web scraping </text:p>
          </table:table-cell>
          <table:table-cell table:style-name="Table4.B2" office:value-type="string">
            <text:p text:style-name="P88"/>
            <text:p text:style-name="P88">requests, BeautifulSoup</text:p>
          </table:table-cell>
          <table:table-cell table:style-name="Table4.D2" office:value-type="string">
            <text:p text:style-name="P89"/>
            <text:p text:style-name="P89">dailynews_raw.csv, citizen_raw.csv,</text:p>
          </table:table-cell>
        </table:table-row>
        <table:table-row table:style-name="Table4.1">
          <table:table-cell table:style-name="Table4.A3" office:value-type="string">
            <text:p text:style-name="P88"/>
            <text:p text:style-name="P88">Clean and unify headline data</text:p>
          </table:table-cell>
          <table:table-cell table:style-name="Table4.B3" office:value-type="string">
            <text:p text:style-name="P88"/>
            <text:p text:style-name="P88">Merging and cleaning scrapped data</text:p>
          </table:table-cell>
          <table:table-cell table:style-name="Table4.B3" office:value-type="string">
            <text:p text:style-name="P88"/>
            <text:p text:style-name="P88">pandas</text:p>
          </table:table-cell>
          <table:table-cell table:style-name="Table4.D3" office:value-type="string">
            <text:p text:style-name="P89"/>
            <text:p text:style-name="P89">tz_headlines_clean.csv</text:p>
          </table:table-cell>
        </table:table-row>
        <table:table-row table:style-name="Table4.1">
          <table:table-cell table:style-name="Table4.A3" office:value-type="string">
            <text:p text:style-name="P88"/>
            <text:p text:style-name="P88">Comparing available NLP Models</text:p>
          </table:table-cell>
          <table:table-cell table:style-name="Table4.B3" office:value-type="string">
            <text:p text:style-name="P88"/>
            <text:p text:style-name="P88">Multi model accuracy comparison on labeled data</text:p>
          </table:table-cell>
          <table:table-cell table:style-name="Table4.B3" office:value-type="string">
            <text:p text:style-name="P88"/>
            <text:p text:style-name="P88">TextBlob, VADER, FinBERT, GPT-mini 4.0, Llama-3.1B &amp; 3.3B</text:p>
          </table:table-cell>
          <table:table-cell table:style-name="Table4.D3" office:value-type="string">
            <text:p text:style-name="P89"/>
            <text:p text:style-name="P89">benchmarking_results.csv</text:p>
          </table:table-cell>
        </table:table-row>
        <table:table-row table:style-name="Table4.1">
          <table:table-cell table:style-name="Table4.A3" office:value-type="string">
            <text:p text:style-name="P88"/>
            <text:p text:style-name="P88">Classify headlines by category and sentiment</text:p>
          </table:table-cell>
          <table:table-cell table:style-name="Table4.B3" office:value-type="string">
            <text:p text:style-name="P88"/>
            <text:p text:style-name="P88">LLM processing and api retrieval </text:p>
          </table:table-cell>
          <table:table-cell table:style-name="Table4.B3" office:value-type="string">
            <text:p text:style-name="P88"/>
            <text:p text:style-name="P88">Groq API,</text:p>
            <text:p text:style-name="P88">Llama -3.1B</text:p>
          </table:table-cell>
          <table:table-cell table:style-name="Table4.D3" office:value-type="string">
            <text:p text:style-name="P89"/>
            <text:p text:style-name="P89">tz_headlines_labelled.csv</text:p>
          </table:table-cell>
        </table:table-row>
        <table:table-row table:style-name="Table4.1">
          <table:table-cell table:style-name="Table4.A3" office:value-type="string">
            <text:p text:style-name="P88"/>
            <text:p text:style-name="P88">Consolidating news and aggregating data</text:p>
          </table:table-cell>
          <table:table-cell table:style-name="Table4.B3" office:value-type="string">
            <text:p text:style-name="P88"/>
            <text:p text:style-name="P88">Monthly aggregation and <text:span text:style-name="T50">dataset merging</text:span></text:p>
          </table:table-cell>
          <table:table-cell table:style-name="Table4.B3" office:value-type="string">
            <text:p text:style-name="P88"/>
            <text:p text:style-name="P88">pandas</text:p>
          </table:table-cell>
          <table:table-cell table:style-name="Table4.D3" office:value-type="string">
            <text:p text:style-name="P89"/>
            <text:p text:style-name="P89">Visualization_Data.csv</text:p>
          </table:table-cell>
        </table:table-row>
        <table:table-row table:style-name="Table4.1">
          <table:table-cell table:style-name="Table4.A7" office:value-type="string">
            <text:p text:style-name="P88"/>
            <text:p text:style-name="P88">Analyse sentiment vs economy</text:p>
          </table:table-cell>
          <table:table-cell table:style-name="Table4.B7" office:value-type="string">
            <text:p text:style-name="P88"/>
            <text:p text:style-name="P88">Time series plots and Pearson correlation</text:p>
          </table:table-cell>
          <table:table-cell table:style-name="Table4.B7" office:value-type="string">
            <text:p text:style-name="P88"/>
            <text:p text:style-name="P88">matplotlib, seaborn, scipy</text:p>
          </table:table-cell>
          <table:table-cell table:style-name="Table4.D7" office:value-type="string">
            <text:p text:style-name="P89"/>
            <text:p text:style-name="P89">Visualisation notebook, Project analysis and conclusion</text:p>
          </table:table-cell>
        </table:table-row>
      </table:table>
      <text:p text:style-name="P37"/>
      <text:p text:style-name="P90"><text:span text:style-name="T51">Table </text:span><text:span text:style-name="T52">1</text:span><text:span text:style-name="T51">.1: </text:span><text:span text:style-name="T53">Methodology Table</text:span><text:span text:style-name="T51">s </text:span><text:span text:style-name="T54">F</text:span><text:span text:style-name="T51">or EF-02</text:span></text:p>
      <text:h text:style-name="P38" text:outline-level="1"><text:bookmark-start text:name="__RefHeading___Toc4393_3468845459"/>CHAPTER FOUR: SYSTEM ANALYSIS AND DESIGN<text:bookmark-end text:name="__RefHeading___Toc4393_3468845459"/></text:h>
      <text:h text:style-name="P52" text:outline-level="2"><text:bookmark-start text:name="__RefHeading___Toc4395_3468845459"/>4.1 Introduction<text:bookmark-end text:name="__RefHeading___Toc4395_3468845459"/></text:h>
      <text:p text:style-name="P91">This chapter presents the analysis and implementation requirements of the proposed system for Tanzanian financial news sentiment analysis. It describes the requirements identified before development and explains the resources needed for successful system operation. The chapter also outlines the system and data requirements used to support data collection, processing, sentiment classification, and visualisation of findings. These requirements formed the foundation for <text:span text:style-name="T55">a</text:span> complete project workflow. </text:p>
      <text:h text:style-name="P92" text:outline-level="2"><text:bookmark-start text:name="__RefHeading___Toc4397_3468845459"/>4.2 Requirement Analysis<text:bookmark-end text:name="__RefHeading___Toc4397_3468845459"/></text:h>
      <text:p text:style-name="P93">Requirement analysis is the process of identifying, evaluating, documenting, and managing the needs and constraints of a system to ensure that it fulfills its intended objectives (Sommerville, 2016). It helps ensure that the developed system satisfies both operational and technical expectations before implementation begins. For this project, requirement analysis focused on two major categories: </text:p>
      <text:list text:style-name="L5">
        <text:list-item>
          <text:p text:style-name="P94"><text:span text:style-name="T56">User requirements:</text:span> define<text:span text:style-name="T57">s</text:span> what end users expect from the system</text:p>
        </text:list-item>
        <text:list-item>
          <text:p text:style-name="P94"><text:span text:style-name="T58">S</text:span><text:span text:style-name="T56">ystem requirements:</text:span> define the technical capabilities and resources necessary to support system functionality. </text:p>
        </text:list-item>
      </text:list>
      <text:h text:style-name="P53" text:outline-level="3"><text:bookmark-start text:name="__RefHeading___Toc4399_3468845459"/>4.2.1 System Requirements<text:bookmark-end text:name="__RefHeading___Toc4399_3468845459"/></text:h>
      <text:p text:style-name="P95">System requirements refer to the technical specifications and resources needed for a system to operate effectively and achieve its intended functions (Pressman &amp; Maxim, 2020). They define the environment and conditions required to develop, execute, and maintain the system successfully. For this project, system requirements were analysed under three categories:</text:p>
      <text:list text:style-name="L6">
        <text:list-item>
          <text:p text:style-name="P96"><text:bookmark text:name="p-rc_157bbd29ebacf04b-180"/>Hardware Requirements: The physical computing infrastructure needed to execute system workloads and data computations. </text:p>
        </text:list-item>
        <text:list-item>
          <text:p text:style-name="P96">Software Requirements: The platforms, tools, and libraries required to provide development and analytical capabilities.</text:p>
        </text:list-item>
        <text:list-item>
          <text:p text:style-name="P96"><text:bookmark text:name="p-rc_157bbd29ebacf04b-181"/>Data Requirements: The raw inputs and datasets necessary to perform sentiment classification and economic analysis. </text:p>
        </text:list-item>
      </text:list>
      <text:h text:style-name="P97" text:outline-level="4"><text:bookmark-start text:name="__RefHeading___Toc4401_3468845459"/><text:soft-page-break/><text:span text:style-name="T29">4.2.1.1 Data Requirements</text:span><text:bookmark-end text:name="__RefHeading___Toc4401_3468845459"/></text:h>
      <text:p text:style-name="P98">The system used multiple datasets collected from publicly available sources to support financial sentiment analysis and economic correlation assessment for the period 2022–2024. The data was collected, processed, and consolidated into a final dataset used for analysis and visualisation.</text:p>
      <text:p text:style-name="P98">The following data types were collected and used:</text:p>
      <text:list text:style-name="L7">
        <text:list-item>
          <text:p text:style-name="P99"><text:span text:style-name="Strong_20_Emphasis"><text:span text:style-name="T41">News Headlines: </text:span></text:span><text:span text:style-name="T59">Collected through web scraping from the business sections of Daily News Tanzania and The Citizen. The dataset included publication date, headline text, article URL, and source. It was used for sentiment classification, category assignment, and monthly sentiment analysis.</text:span></text:p>
          <text:p text:style-name="P100"/>
        </text:list-item>
        <text:list-item>
          <text:p text:style-name="P99"><text:span text:style-name="Strong_20_Emphasis"><text:span text:style-name="T41">USD/TZS Exchange Rate Data: </text:span></text:span><text:span text:style-name="T59">Daily exchange rate data was collected from Investing.com and converted into monthly averages with month-on-month percentage changes. This data was used to analyse currency movement against news sentiment trends.</text:span></text:p>
          <text:p text:style-name="P99"><text:span text:style-name="Strong_20_Emphasis"><text:span text:style-name="T59"/></text:span></text:p>
        </text:list-item>
        <text:list-item>
          <text:p text:style-name="P99"><text:span text:style-name="Strong_20_Emphasis"><text:span text:style-name="T41">Consumer Price Index (CPI) Data: </text:span></text:span><text:span text:style-name="T59">Monthly inflation data was collected from NBS Tanzania CPI reports (2022–2024). This dataset was used to compare inflation behaviour with aggregated sentiment results.</text:span></text:p>
          <text:p text:style-name="P100"/>
        </text:list-item>
        <text:list-item>
          <text:p text:style-name="P99"><text:span text:style-name="Strong_20_Emphasis"><text:span text:style-name="T41">Labelled Sample Dataset:</text:span></text:span><text:span text:style-name="Strong_20_Emphasis"><text:span text:style-name="T59"> </text:span></text:span><text:span text:style-name="T59">Synthetic and test headlines were prepared and used during benchmarking to evaluate sentiment classification models before full dataset processing.</text:span></text:p>
          <text:p text:style-name="P100"/>
        </text:list-item>
        <text:list-item>
          <text:p text:style-name="P101"><text:span text:style-name="Strong_20_Emphasis"><text:span text:style-name="T41">Processed Sentiment Dataset:</text:span></text:span><text:span text:style-name="Strong_20_Emphasis"><text:span text:style-name="T59"> </text:span></text:span><text:span text:style-name="T59">Generated after classification and consolidation, containing sentiment labels, categories, and monthly aggregates used for final visualisation and correlation analysis.</text:span></text:p>
        </text:list-item>
      </text:list>
      <text:p text:style-name="P102"/>
      <text:p text:style-name="P103"/>
      <text:h text:style-name="P104" text:outline-level="4"/>
      <text:h text:style-name="P105" text:outline-level="4"><text:bookmark-start text:name="__RefHeading___Toc4403_3468845459"/>4.2.1.2 Software Requirements<text:bookmark-end text:name="__RefHeading___Toc4403_3468845459"/></text:h>
      <text:p text:style-name="P106">Software requirements refer to the applications and development tools required for implementing, executing, and maintaining a system successfully (Pressman &amp; Maxim, 2020). These tools provide the environment necessary for data collection, processing, classification, analysis, and visualisation.</text:p>
      <text:p text:style-name="P106">The following software was used in this project:</text:p>
      <text:list text:style-name="L8">
        <text:list-item>
          <text:p text:style-name="P107"><text:span text:style-name="Strong_20_Emphasis"><text:span text:style-name="T41">Python 3:</text:span></text:span><text:span text:style-name="Strong_20_Emphasis"><text:span text:style-name="T59"> </text:span></text:span><text:span text:style-name="T59">Used as the primary programming language for implementing all stages of the project pipeline due to its flexibility and strong support for data science applications.</text:span></text:p>
          <text:p text:style-name="P108"/>
        </text:list-item>
        <text:list-item>
          <text:p text:style-name="P107"><text:span text:style-name="Strong_20_Emphasis"><text:span text:style-name="T41">Jupyter Notebook:</text:span></text:span><text:span text:style-name="Strong_20_Emphasis"><text:span text:style-name="T59"> </text:span></text:span><text:span text:style-name="T59">Used as the development environment to build and execute the project in modular stages while supporting reproducibility and easier testing.</text:span></text:p>
          <text:p text:style-name="P108"/>
        </text:list-item>
        <text:list-item>
          <text:p text:style-name="P107"><text:span text:style-name="Strong_20_Emphasis"><text:span text:style-name="T41">Python Libraries:</text:span></text:span><text:span text:style-name="Strong_20_Emphasis"><text:span text:style-name="T59"> </text:span></text:span><text:span text:style-name="T59">Several libraries were used to support implementation:</text:span></text:p>
          <text:list>
            <text:list-item>
              <text:p text:style-name="P109"><text:span text:style-name="Source_20_Text"><text:span text:style-name="T60">pandas:</text:span></text:span><text:span text:style-name="T60"> data cleaning, merging, and monthly aggregation.</text:span></text:p>
            </text:list-item>
            <text:list-item>
              <text:p text:style-name="P109"><text:span text:style-name="Source_20_Text"><text:span text:style-name="T60">requests</text:span></text:span><text:span text:style-name="T60"> and </text:span><text:span text:style-name="Source_20_Text"><text:span text:style-name="T60">BeautifulSoup</text:span></text:span><text:span text:style-name="T60">: web scraping and HTML parsing.</text:span></text:p>
            </text:list-item>
            <text:list-item>
              <text:p text:style-name="P109"><text:span text:style-name="Source_20_Text"><text:span text:style-name="T60">Openai </text:span></text:span><text:span text:style-name="Source_20_Text"><text:span text:style-name="T61">and Groq</text:span></text:span><text:span text:style-name="T60"> SDK : </text:span><text:span text:style-name="T61">API pipelines for accessing</text:span><text:span text:style-name="T60"> LLM</text:span><text:span text:style-name="T61">s</text:span><text:span text:style-name="T60">.</text:span></text:p>
            </text:list-item>
            <text:list-item>
              <text:p text:style-name="P109"><text:span text:style-name="Source_20_Text"><text:span text:style-name="T60">matplotlib</text:span></text:span><text:span text:style-name="T60"> and </text:span><text:span text:style-name="Source_20_Text"><text:span text:style-name="T60">seaborn:</text:span></text:span><text:span text:style-name="T60"> charts and visual analysis.</text:span></text:p>
            </text:list-item>
            <text:list-item>
              <text:p text:style-name="P109"><text:span text:style-name="Source_20_Text"><text:span text:style-name="T60">Scipy:</text:span></text:span><text:span text:style-name="T60"> Pearson correlation and p-value calculations.</text:span></text:p>
            </text:list-item>
            <text:list-item>
              <text:p text:style-name="P110"><text:span text:style-name="Source_20_Text"><text:span text:style-name="T60">Python-dotenv:</text:span></text:span><text:span text:style-name="T60"> secure loading of API keys from environment files.</text:span></text:p>
            </text:list-item>
            <text:list-item>
              <text:p text:style-name="P111"/>
            </text:list-item>
          </text:list>
        </text:list-item>
      </text:list>
      <text:h text:style-name="P112" text:outline-level="4"><text:bookmark-start text:name="__RefHeading___Toc4405_3468845459"/>4.2.1.3 Hardware Requirements<text:bookmark-end text:name="__RefHeading___Toc4405_3468845459"/></text:h>
      <text:p text:style-name="P103">Hardware requirements refer to the physical computing resources required to develop, execute, and maintain a system effectively (Pressman &amp; Maxim, 2020). For this project, no specialised hardware was required since model inference was performed through Groq cloud servers.</text:p>
      <text:p text:style-name="P113">The following hardware resources were sufficient:</text:p>
      <text:list text:style-name="L9">
        <text:list-item>
          <text:p text:style-name="P114"><text:span text:style-name="Strong_20_Emphasis"><text:span text:style-name="T41">Laptop/Desktop Computer:</text:span></text:span><text:span text:style-name="Strong_20_Emphasis"><text:span text:style-name="T59"> </text:span></text:span><text:span text:style-name="T59">A standard personal computer was used to develop and run all project notebooks, perform web scraping, process datasets, and generate visualisations.</text:span></text:p>
          <text:p text:style-name="P115"/>
        </text:list-item>
        <text:list-item>
          <text:p text:style-name="P114"><text:span text:style-name="Strong_20_Emphasis"><text:span text:style-name="T41">Memory (RAM):</text:span></text:span><text:span text:style-name="Strong_20_Emphasis"><text:span text:style-name="T59"> </text:span></text:span><text:span text:style-name="T59">At least 8 GB RAM was sufficient to support data cleaning, aggregation, classification workflows, and notebook execution.</text:span></text:p>
          <text:p text:style-name="P115"/>
        </text:list-item>
        <text:list-item>
          <text:p text:style-name="P114"><text:span text:style-name="Strong_20_Emphasis"><text:span text:style-name="T41">Storage:</text:span></text:span><text:span text:style-name="Strong_20_Emphasis"><text:span text:style-name="T59"> </text:span></text:span><text:span text:style-name="T59">Local storage was required to store notebooks, CSV datasets, and generated outputs. Storage requirements remained low since processed datasets were below approximately 50 MB.</text:span></text:p>
          <text:p text:style-name="P115"/>
        </text:list-item>
        <text:list-item>
          <text:p text:style-name="P116"><text:span text:style-name="Strong_20_Emphasis"><text:span text:style-name="T41">Internet Connection:</text:span></text:span><text:span text:style-name="Strong_20_Emphasis"><text:span text:style-name="T59"> </text:span></text:span><text:span text:style-name="T59">Required for web scraping, accessing external datasets, and communicating with Groq APIs for sentiment classification.</text:span></text:p>
        </text:list-item>
      </text:list>
      <text:p text:style-name="P113">No dedicated GPU was required because large language model inference was executed on Groq cloud infrastructure rather than locally.</text:p>
      <text:h text:style-name="P117" text:outline-level="3"/>
      <text:h text:style-name="P104" text:outline-level="4"/>
      <text:h text:style-name="P105" text:outline-level="4"><text:bookmark-start text:name="__RefHeading___Toc4409_3468845459"/>4.2.2.1 Functional Requirements<text:bookmark-end text:name="__RefHeading___Toc4409_3468845459"/></text:h>
      <text:p text:style-name="P118">The system shall scrape and store financial news headlines together with publication date, source, and article URL. </text:p>
      <text:list text:style-name="L10">
        <text:list-item>
          <text:p text:style-name="P119"><text:span text:style-name="Strong_20_Emphasis"><text:span text:style-name="T62">Headline Classification:</text:span></text:span><text:span text:style-name="Strong_20_Emphasis"><text:span text:style-name="T63"> </text:span></text:span><text:span text:style-name="T63">The system shall filter irrelevant headlines and assign both economic categories and sentiment labels (Positive, Negative, Neutral).</text:span></text:p>
        </text:list-item>
        <text:list-item>
          <text:p text:style-name="P119"><text:span text:style-name="Strong_20_Emphasis"><text:span text:style-name="T62">Sentiment Aggregation:</text:span></text:span><text:span text:style-name="Strong_20_Emphasis"><text:span text:style-name="T63"> </text:span></text:span><text:span text:style-name="T63">The system shall aggregate relevant headlines into monthly sentiment indicators and distributions.</text:span></text:p>
        </text:list-item>
        <text:list-item>
          <text:p text:style-name="P119"><text:span text:style-name="Strong_20_Emphasis"><text:span text:style-name="T62">Data Consolidation:</text:span></text:span><text:span text:style-name="Strong_20_Emphasis"><text:span text:style-name="T63"> </text:span></text:span><text:span text:style-name="T63">The system shall merge sentiment outputs with CPI inflation and USD/TZS exchange rate datasets.</text:span></text:p>
        </text:list-item>
        <text:list-item>
          <text:p text:style-name="P119"><text:span text:style-name="Strong_20_Emphasis"><text:span text:style-name="T62">Visualisation and Analysis:</text:span></text:span><text:span text:style-name="Strong_20_Emphasis"><text:span text:style-name="T63"> </text:span></text:span><text:span text:style-name="T63">The system shall generate charts and correlation statistics to support interpretation of relationships between financial news sentiment and economic indicators.</text:span></text:p>
        </text:list-item>
        <text:list-item>
          <text:p text:style-name="P119"><text:span text:style-name="Strong_20_Emphasis"><text:span text:style-name="T62">Scraping Recovery Support</text:span></text:span><text:span text:style-name="Emphasis"><text:span text:style-name="T62">: </text:span></text:span><text:span text:style-name="T63">The system shall support checkpointing and resume capability during long scraping sessions to minimise data loss from interruptions.</text:span></text:p>
        </text:list-item>
      </text:list>
      <text:p text:style-name="P17"/>
      <text:h text:style-name="P104" text:outline-level="4"><text:bookmark-start text:name="__RefHeading___Toc4411_3468845459"/>4.2.2.2 Non Functional Requirements<text:bookmark-end text:name="__RefHeading___Toc4411_3468845459"/></text:h>
      <text:p text:style-name="P103">Non-functional requirements describe the quality attributes and operating conditions that determine how effectively a system performs its functions (Sommerville, 2016). Unlike functional requirements, they focus on characteristics such as reliability, usability, maintainability, and security rather than specific system operations.</text:p>
      <text:list text:style-name="L11">
        <text:list-item>
          <text:p text:style-name="P120"><text:span text:style-name="Strong_20_Emphasis"><text:span text:style-name="T41">Reproducibility:</text:span></text:span><text:span text:style-name="T41"> </text:span><text:span text:style-name="T59">The system shall support repeatable execution through a numbered notebook pipeline with documented inputs and outputs at each stage.</text:span></text:p>
        </text:list-item>
        <text:list-item>
          <text:p text:style-name="P121"><text:span text:style-name="Strong_20_Emphasis"><text:span text:style-name="T41">Security:</text:span></text:span><text:span text:style-name="T41"> </text:span><text:span text:style-name="T59">The system shall protect sensitive credentials by storing API keys in environment files (</text:span><text:span text:style-name="Source_20_Text"><text:span text:style-name="T59">.env</text:span></text:span><text:span text:style-name="T59">) and excluding them from version control.</text:span></text:p>
        </text:list-item>
        <text:list-item>
          <text:p text:style-name="P122"><text:span text:style-name="Strong_20_Emphasis"><text:span text:style-name="T41">Reliability:</text:span></text:span><text:span text:style-name="T59"> The system shall maintain stable execution through batch retries, validation checks, and checkpoint saving to handle network and API interruptions.</text:span></text:p>
        </text:list-item>
        <text:list-item>
          <text:p text:style-name="P123"><text:span text:style-name="Strong_20_Emphasis"><text:span text:style-name="T41">Usability:</text:span></text:span><text:span text:style-name="T59"> The system shall present outputs through clear notebook sections, structured summaries, and readable visualisations </text:span><text:span text:style-name="T64">without code.</text:span></text:p>
        </text:list-item>
        <text:list-item>
          <text:p text:style-name="P123"><text:soft-page-break/><text:span text:style-name="Strong_20_Emphasis"><text:span text:style-name="T41">Maintainability:</text:span></text:span><text:span text:style-name="T59"> The system shall use a modular notebook structure so that individual stages can be modified without affecting the entire workflow.</text:span></text:p>
        </text:list-item>
        <text:list-item>
          <text:p text:style-name="P120"><text:span text:style-name="Strong_20_Emphasis"><text:span text:style-name="T41">Transparency:</text:span></text:span><text:span text:style-name="T59"> The system shall document known limitations and data quality considerations within the final analysis stage to support interpretation of results.</text:span></text:p>
        </text:list-item>
      </text:list>
      <text:h text:style-name="P52" text:outline-level="2"><text:bookmark-start text:name="__RefHeading___Toc4413_3468845459"/>4.3 System Design<text:bookmark-end text:name="__RefHeading___Toc4413_3468845459"/></text:h>
      <text:h text:style-name="P53" text:outline-level="3"><text:bookmark-start text:name="__RefHeading___Toc4415_3468845459"/>4.3.1 System Architecture<text:bookmark-end text:name="__RefHeading___Toc4415_3468845459"/></text:h>
      <text:p text:style-name="P103">System architecture refers to the high-level structure of a system that defines its components, their relationships, and the flow of data and processes between them (Sommerville, 2016). It provides a blueprint for how system components interact to achieve the intended objectives and supports understanding, implementation, maintenance, and future improvements. For this project, the system architecture was included to illustrate the complete workflow of the financial news sentiment analysis pipeline and show how data moves from collection through processing, classification, consolidation, and final analysis.</text:p>
      <text:p text:style-name="P124"><draw:frame draw:style-name="fr3" draw:name="Image1" text:anchor-type="char" svg:width="6.0181in" svg:height="4.4874in" draw:z-index="4"><draw:image xlink:href="Pictures/10000000000003EB0000039C6974B984.png" xlink:type="simple" xlink:show="embed" xlink:actuate="onLoad" draw:mime-type="image/png"/></draw:frame><text:span text:style-name="T65">Figure 4.1: </text:span><text:span text:style-name="T66">System Architecture</text:span><text:span text:style-name="T65"> for</text:span> <text:span text:style-name="T65">EF-02.</text:span></text:p>
      <text:h text:style-name="P125" text:outline-level="1"><text:bookmark-start text:name="__RefHeading___Toc4417_3468845459"/>CHAPTER FIVE: IMPLEMENTATION AND TESTING<text:bookmark-end text:name="__RefHeading___Toc4417_3468845459"/></text:h>
      <text:h text:style-name="P52" text:outline-level="2"><text:bookmark-start text:name="__RefHeading___Toc4419_3468845459"/>5.1 Introduction<text:bookmark-end text:name="__RefHeading___Toc4419_3468845459"/></text:h>
      <text:p text:style-name="P17">This chapter presents the implementation of the proposed financial news sentiment analysis system. It describes the major system components, their functions, and how they operate within the complete workflow. The chapter also demonstrates how data moves through the system from collection to final analysis and presents screenshots to illustrate implementation outcomes. </text:p>
      <text:h text:style-name="P52" text:outline-level="2"><text:bookmark-start text:name="__RefHeading___Toc4421_3468845459"/>5.2 Implementation<text:bookmark-end text:name="__RefHeading___Toc4421_3468845459"/></text:h>
      <text:h text:style-name="P53" text:outline-level="3"><text:bookmark-start text:name="__RefHeading___Toc4423_3468845459"/><text:tab/>5.2.1 Web Scraper<text:bookmark-end text:name="__RefHeading___Toc4423_3468845459"/></text:h>
      <text:p text:style-name="P126"><text:span text:style-name="T67">This module was implemented using Python with </text:span><text:span text:style-name="Source_20_Text"><text:span text:style-name="T68">requests</text:span></text:span><text:span text:style-name="T67"> and</text:span><text:span text:style-name="T69"> </text:span><text:span text:style-name="Source_20_Text"><text:span text:style-name="T69">BeautifulSoup</text:span></text:span><text:span text:style-name="T69"> </text:span><text:span text:style-name="T67">to collect financial news headlines from Daily News Tanzania and The Citizen. The scraper automatically extracted publication date, headline text, article URL, and source information from business category pages covering 2022–2024. The module supports checkpoint saving and resume functionality to reduce data loss during long scraping sessions.</text:span></text:p>
      <text:p text:style-name="P127"><draw:frame draw:style-name="fr4" draw:name="Image3" text:anchor-type="char" svg:x="0in" svg:y="-0.1291in" svg:width="6.0181in" svg:height="1.9339in" draw:z-index="5"><draw:image xlink:href="Pictures/10000000000003B500000131F410673B.png" xlink:type="simple" xlink:show="embed" xlink:actuate="onLoad" draw:mime-type="image/png"/></draw:frame><draw:frame draw:style-name="fr4" draw:name="Image4" text:anchor-type="char" svg:x="0.3035in" svg:y="2.0236in" svg:width="5.7146in" svg:height="1.4299in" draw:z-index="6"><draw:image xlink:href="Pictures/1000000100000410000000E6BFC1726B.png" xlink:type="simple" xlink:show="embed" xlink:actuate="onLoad" draw:mime-type="image/png"/></draw:frame></text:p>
      <text:p text:style-name="P128"><text:span text:style-name="T65">Figure </text:span><text:span text:style-name="T70">5</text:span><text:span text:style-name="T65">.1: </text:span><text:span text:style-name="T71">Screenshots showing the initiation and termination of <text:s/>headline scrapping function</text:span><text:span text:style-name="T65"> for</text:span> <text:span text:style-name="T65">EF-02.</text:span></text:p>
      <text:h text:style-name="P53" text:outline-level="3"><text:bookmark-start text:name="__RefHeading___Toc4425_3468845459"/><text:soft-page-break/><text:tab/>5.2.2 Data Cleaning<text:bookmark-end text:name="__RefHeading___Toc4425_3468845459"/></text:h>
      <text:p text:style-name="P17">This module merged headline datasets collected from different sources into a unified dataset. It performed date standardisation, duplicate removal, and filtering of malformed records to improve data quality before classification <text:span text:style-name="T72">of the news headlines</text:span>.</text:p>
      <text:p text:style-name="P129"><draw:frame draw:style-name="fr5" draw:name="Image5" text:anchor-type="char" svg:width="6.0181in" svg:height="3.6965in" draw:z-index="8"><draw:image xlink:href="Pictures/100000010000036E000001E54E4BEE63.png" xlink:type="simple" xlink:show="embed" xlink:actuate="onLoad" draw:mime-type="image/png"/></draw:frame></text:p>
      <text:p text:style-name="P129"><text:span text:style-name="T73">F</text:span>igure <text:span text:style-name="T72">5</text:span>.<text:span text:style-name="T72">2</text:span>: <text:span text:style-name="T72">Screenshots showing succesful data cleaning f</text:span>or EF-02.</text:p>
      <text:p text:style-name="P130"><text:span text:style-name="T74"/></text:p>
      <text:h text:style-name="P53" text:outline-level="3"><text:bookmark-start text:name="__RefHeading___Toc4427_3468845459"/>5.2.3 Model Benchmarking<text:bookmark-end text:name="__RefHeading___Toc4427_3468845459"/></text:h>
      <text:p text:style-name="P17">This module evaluated multiple sentiment classification approaches using a labelled sample dataset. Models including TextBlob, VADER, FinBERT, and LLM-based approaches were compared to identify the most suitable model for production use based on classification performance. </text:p>
      <table:table table:name="Table5" table:style-name="Table5">
        <table:table-column table:style-name="Table5.A" table:number-columns-repeated="2"/>
        <table:table-row table:style-name="Table5.1">
          <table:table-cell table:style-name="Table5.A1" office:value-type="string">
            <text:p text:style-name="P131">Model</text:p>
          </table:table-cell>
          <table:table-cell table:style-name="Table5.A1" office:value-type="string">
            <text:p text:style-name="P131">Accuracy (%)</text:p>
          </table:table-cell>
        </table:table-row>
        <table:table-row table:style-name="Table5.1">
          <table:table-cell table:style-name="Table5.A1" office:value-type="string">
            <text:p text:style-name="P132">TextBlob</text:p>
          </table:table-cell>
          <table:table-cell table:style-name="Table5.A1" office:value-type="string">
            <text:p text:style-name="P132">28.2 %</text:p>
          </table:table-cell>
        </table:table-row>
        <table:table-row table:style-name="Table5.1">
          <table:table-cell table:style-name="Table5.A1" office:value-type="string">
            <text:p text:style-name="P132">VADER</text:p>
          </table:table-cell>
          <table:table-cell table:style-name="Table5.A1" office:value-type="string">
            <text:p text:style-name="P132">50.0 %</text:p>
          </table:table-cell>
        </table:table-row>
        <table:table-row table:style-name="Table5.1">
          <table:table-cell table:style-name="Table5.A1" office:value-type="string">
            <text:p text:style-name="P132">FinBERT</text:p>
          </table:table-cell>
          <table:table-cell table:style-name="Table5.A1" office:value-type="string">
            <text:p text:style-name="P132">66.7 %</text:p>
          </table:table-cell>
        </table:table-row>
        <table:table-row table:style-name="Table5.1">
          <table:table-cell table:style-name="Table5.A1" office:value-type="string">
            <text:p text:style-name="P132">GPT-4o-mini</text:p>
          </table:table-cell>
          <table:table-cell table:style-name="Table5.A1" office:value-type="string">
            <text:p text:style-name="P132">92.9 %</text:p>
          </table:table-cell>
        </table:table-row>
        <table:table-row table:style-name="Table5.1">
          <table:table-cell table:style-name="Table5.A1" office:value-type="string">
            <text:p text:style-name="P132">Llama 3.1 8B (Groq)</text:p>
          </table:table-cell>
          <table:table-cell table:style-name="Table5.A1" office:value-type="string">
            <text:p text:style-name="P132">92.7 %</text:p>
          </table:table-cell>
        </table:table-row>
        <table:table-row table:style-name="Table5.7">
          <table:table-cell table:style-name="Table5.A1" office:value-type="string">
            <text:p text:style-name="P132">Llama 3.3 70B (Groq)</text:p>
          </table:table-cell>
          <table:table-cell table:style-name="Table5.A1" office:value-type="string">
            <text:p text:style-name="P132">93.5 %</text:p>
          </table:table-cell>
        </table:table-row>
      </table:table>
      <text:p text:style-name="P133"><text:span text:style-name="T75">Table 5.1</text:span>: <text:span text:style-name="T69">Model Benchmarking Results</text:span></text:p>
      <text:h text:style-name="P53" text:outline-level="3"><text:bookmark-start text:name="__RefHeading___Toc4429_3468845459"/>5.2.4 Production Classifier<text:bookmark-end text:name="__RefHeading___Toc4429_3468845459"/></text:h>
      <text:p text:style-name="P17">The production classifier (04_classifier.ipynb) uses the Groq API with Llama models. Each API call processes 25 headlines and returns a JSON array with relevance, category (one of nine: Forex, Policy, Banking, Trade, Agriculture, Energy, Transport, Investment, General), and sentiment (Positive, Negative, Neutral) based on implied economic outcome. Batch size is 25 with up to 3 retries. Temperature is set to 0 for consistent output. Of 5,310 headlines, 72.2% were marked relevant (3,836). Among relevant headlines, Neutral was most common (2,398), followed by Positive (1,114) and Negative (323). Top categories included Banking (785), Agriculture (593), Trade (580), General (551), and Policy (508).</text:p>
      <text:p text:style-name="P134"><draw:frame draw:style-name="fr6" draw:name="Image6" text:anchor-type="char" svg:width="6.0181in" svg:height="3.3453in" draw:z-index="9"><draw:image xlink:href="Pictures/1000000100000434000002514803EDE0.png" xlink:type="simple" xlink:show="embed" xlink:actuate="onLoad" draw:mime-type="image/png"/></draw:frame><text:span text:style-name="T65">Figure </text:span><text:span text:style-name="T70">5</text:span><text:span text:style-name="T65">.</text:span><text:span text:style-name="T70">2</text:span><text:span text:style-name="T65">: </text:span><text:span text:style-name="T70">Screenshots showing </text:span><text:span text:style-name="T76">Results after classification</text:span><text:span text:style-name="T70"> f</text:span><text:span text:style-name="T65">or</text:span> <text:span text:style-name="T65">EF-02.</text:span></text:p>
      <text:h text:style-name="P53" text:outline-level="3"><text:bookmark-start text:name="__RefHeading___Toc4431_3468845459"/><text:soft-page-break/>5.2.5 Data Consolidation<text:bookmark-end text:name="__RefHeading___Toc4431_3468845459"/></text:h>
      <text:p text:style-name="P135">The consolidation notebook (05_consolidation.ipynb) drops irrelevant headlines, groups by YearMonth, and computes num_headlines, category shares, sentiment percentages, and dominant sentiment per month. It merges with monthly CPI inflation and average USD/TZS rate. The final dataset has 3 monthly rows from March 2022 to December 2024.<draw:frame draw:style-name="fr4" draw:name="Image7" text:anchor-type="char" svg:x="-0.0382in" svg:y="1.5346in" svg:width="6.0181in" svg:height="1.272in" draw:z-index="10"><draw:image xlink:href="Pictures/10000001000005900000012D6A4D9845.png" xlink:type="simple" xlink:show="embed" xlink:actuate="onLoad" draw:mime-type="image/png"/></draw:frame><text:line-break/><text:line-break/><text:tab/><text:tab/><text:span text:style-name="T65">Figure 5.2: Screenshots showing </text:span><text:span text:style-name="T76">fully consolidated dataset</text:span><text:span text:style-name="T65"> for</text:span> <text:span text:style-name="T65">EF-02.</text:span></text:p>
      <text:h text:style-name="P136" text:outline-level="3"><text:bookmark-start text:name="__RefHeading___Toc4433_3468845459 Copy 1"/>5.2.6 Visualisation and Analysis<text:bookmark-end text:name="__RefHeading___Toc4433_3468845459 Copy 1"/></text:h>
      <text:p text:style-name="P137">The visualisation notebook (06_visualisation.ipynb) presents eight sections: raw data summary, monthly overview, sentiment distribution, economic indicators, dual axis sentiment versus economy charts, Pearson correlation heatmap, a ranked correlation table with p values, and a limitations section. Inflation ranged from 2.96% to 4.94%. USD/TZS ranged from about 2,313 to 2,720 TZS per dollar. <draw:frame draw:style-name="fr4" draw:name="Image8" text:anchor-type="char" svg:x="1.3409in" svg:y="1.6799in" svg:width="3.2772in" svg:height="2.9in" draw:z-index="11"><draw:image xlink:href="Pictures/1000000100000343000002E3FA792C04.png" xlink:type="simple" xlink:show="embed" xlink:actuate="onLoad" draw:mime-type="image/png"/></draw:frame></text:p>
      <text:p text:style-name="P138">Figure 5.1: Headline relevance split (Relevant 72.2%, Irrelevant 27.8%)</text:p>
      <text:p text:style-name="P139"><text:soft-page-break/><draw:frame draw:style-name="fr7" draw:name="Picture 2" text:anchor-type="as-char" svg:width="5.5in" svg:height="2.1583in" draw:z-index="0"><draw:image xlink:href="Pictures/10000001000005CB000002462854B35D.png" xlink:type="simple" xlink:show="embed" xlink:actuate="onLoad" draw:mime-type="image/png"/></draw:frame></text:p>
      <text:p text:style-name="P140">Figure 5.2: Monthly sentiment distribution (Neutral, Positive, Negative shares)</text:p>
      <text:p text:style-name="P37"/>
      <text:p text:style-name="P139"><draw:frame draw:style-name="fr7" draw:name="Picture 3" text:anchor-type="as-char" svg:width="5.5in" svg:height="1.8098in" draw:z-index="1"><draw:image xlink:href="Pictures/10000001000006F50000024AF42B3477.png" xlink:type="simple" xlink:show="embed" xlink:actuate="onLoad" draw:mime-type="image/png"/></draw:frame></text:p>
      <text:p text:style-name="P140">Figure 5.3: Positive and Negative sentiment versus USD/TZS exchange rate</text:p>
      <text:p text:style-name="P139"><draw:frame draw:style-name="fr7" draw:name="Picture 4" text:anchor-type="as-char" svg:width="3.9098in" svg:height="3.0075in" draw:z-index="2"><draw:image xlink:href="Pictures/100000010000047C000003738740401C.png" xlink:type="simple" xlink:show="embed" xlink:actuate="onLoad" draw:mime-type="image/png"/></draw:frame></text:p>
      <text:p text:style-name="P140">Figure 5.4: Pearson correlation matrix for sentiment and economic variables</text:p>
      <text:p text:style-name="P37"/>
      <text:h text:style-name="P52" text:outline-level="2"><text:bookmark-start text:name="__RefHeading___Toc4435_3468845459"/><text:soft-page-break/>5.3 Testing<text:bookmark-end text:name="__RefHeading___Toc4435_3468845459"/></text:h>
      <text:h text:style-name="P141" text:outline-level="3"><text:bookmark-start text:name="__RefHeading___Toc2497_657679031"/>5.3 Testing<text:bookmark-end text:name="__RefHeading___Toc2497_657679031"/></text:h>
      <text:p text:style-name="P113">System testing was conducted to verify that the implemented system operated correctly and produced reliable outputs. The testing methods used in this project were <text:span text:style-name="Strong_20_Emphasis">functional testing</text:span> and <text:span text:style-name="Strong_20_Emphasis">benchmark testing</text:span>. Functional testing is a software testing method used to evaluate whether system functions operate according to specified requirements and expected outputs (Pressman &amp; Maxim, 2020). Benchmark testing is used to compare different approaches or models against predefined evaluation criteria in order to identify the most suitable solution (Sommerville, 2016). These methods were selected to confirm that the implemented pipeline performed correctly and that the selected sentiment classification approach achieved acceptable performance before full deployment.</text:p>
      <text:h text:style-name="P142" text:outline-level="4"><text:bookmark-start text:name="__RefHeading___Toc2499_657679031"/>5.3.1 Functional Testing<text:bookmark-end text:name="__RefHeading___Toc2499_657679031"/></text:h>
      <text:p text:style-name="P113">Functional testing was performed to verify that each major system function produced the expected output. The test results are summarised below.</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143">S/N</text:p>
            </table:table-cell>
            <table:table-cell table:style-name="Table3.A1" office:value-type="string">
              <text:p text:style-name="P143">Functional Requirement</text:p>
            </table:table-cell>
            <table:table-cell table:style-name="Table3.A1" office:value-type="string">
              <text:p text:style-name="P143">Expected Outcome</text:p>
            </table:table-cell>
            <table:table-cell table:style-name="Table3.A1" office:value-type="string">
              <text:p text:style-name="P143">Test Results</text:p>
            </table:table-cell>
          </table:table-row>
        </table:table-header-rows>
        <table:table-row>
          <table:table-cell table:style-name="Table3.A1" office:value-type="string">
            <text:p text:style-name="P144">1.</text:p>
          </table:table-cell>
          <table:table-cell table:style-name="Table3.A1" office:value-type="string">
            <text:p text:style-name="P144">News Collection</text:p>
          </table:table-cell>
          <table:table-cell table:style-name="Table3.A1" office:value-type="string">
            <text:p text:style-name="P144">System collects and stores headlines with date, source, and URL</text:p>
          </table:table-cell>
          <table:table-cell table:style-name="Table3.A1" office:value-type="string">
            <text:p text:style-name="P144">Passed</text:p>
          </table:table-cell>
        </table:table-row>
        <table:table-row>
          <table:table-cell table:style-name="Table3.A1" office:value-type="string">
            <text:p text:style-name="P144">2.</text:p>
          </table:table-cell>
          <table:table-cell table:style-name="Table3.A1" office:value-type="string">
            <text:p text:style-name="P144">Headline Classification</text:p>
          </table:table-cell>
          <table:table-cell table:style-name="Table3.A1" office:value-type="string">
            <text:p text:style-name="P144">System assigns relevance, category, and sentiment labels</text:p>
          </table:table-cell>
          <table:table-cell table:style-name="Table3.A1" office:value-type="string">
            <text:p text:style-name="P144">Passed</text:p>
          </table:table-cell>
        </table:table-row>
        <table:table-row>
          <table:table-cell table:style-name="Table3.A1" office:value-type="string">
            <text:p text:style-name="P144">3.</text:p>
          </table:table-cell>
          <table:table-cell table:style-name="Table3.A1" office:value-type="string">
            <text:p text:style-name="P144">Sentiment Aggregation</text:p>
          </table:table-cell>
          <table:table-cell table:style-name="Table3.A1" office:value-type="string">
            <text:p text:style-name="P144">System produces monthly sentiment distributions</text:p>
          </table:table-cell>
          <table:table-cell table:style-name="Table3.A1" office:value-type="string">
            <text:p text:style-name="P144">Passed</text:p>
          </table:table-cell>
        </table:table-row>
        <table:table-row>
          <table:table-cell table:style-name="Table3.A1" office:value-type="string">
            <text:p text:style-name="P144">4.</text:p>
          </table:table-cell>
          <table:table-cell table:style-name="Table3.A1" office:value-type="string">
            <text:p text:style-name="P144">Data Consolidation</text:p>
          </table:table-cell>
          <table:table-cell table:style-name="Table3.A1" office:value-type="string">
            <text:p text:style-name="P144">System merges sentiment, CPI, and USD/TZS datasets correctly</text:p>
          </table:table-cell>
          <table:table-cell table:style-name="Table3.A1" office:value-type="string">
            <text:p text:style-name="P144">Passed</text:p>
          </table:table-cell>
        </table:table-row>
        <table:table-row>
          <table:table-cell table:style-name="Table3.A1" office:value-type="string">
            <text:p text:style-name="P144">5.</text:p>
          </table:table-cell>
          <table:table-cell table:style-name="Table3.A1" office:value-type="string">
            <text:p text:style-name="P144">Visualisation and Analysis</text:p>
          </table:table-cell>
          <table:table-cell table:style-name="Table3.A1" office:value-type="string">
            <text:p text:style-name="P144">System generates charts and correlation outputs</text:p>
          </table:table-cell>
          <table:table-cell table:style-name="Table3.A1" office:value-type="string">
            <text:p text:style-name="P144">Passed</text:p>
          </table:table-cell>
        </table:table-row>
      </table:table>
      <text:p text:style-name="P145"><text:span text:style-name="Strong_20_Emphasis">Result:</text:span> All functional requirements were successfully executed and produced outputs consistent with the intended system behaviour.</text:p>
      <text:h text:style-name="P146" text:outline-level="4"><text:bookmark-start text:name="__RefHeading___Toc2501_657679031"/><text:soft-page-break/>5.3.2 Benchmark Testing<text:bookmark-end text:name="__RefHeading___Toc2501_657679031"/></text:h>
      <text:p text:style-name="P113">Benchmark testing was performed during model selection to compare sentiment classification performance across multiple approaches before production deployment. The tested models included TextBlob, VADER, FinBERT, and LLM-based approaches. Accuracy comparison showed that LLM-based classification achieved the strongest overall performance and was selected for implementation.</text:p>
      <table:table table:name="Table6" table:style-name="Table6">
        <table:table-column table:style-name="Table6.A"/>
        <table:table-column table:style-name="Table6.B"/>
        <table:table-header-rows>
          <table:table-row>
            <table:table-cell table:style-name="Table6.A1" office:value-type="string">
              <text:p text:style-name="Table_20_Heading">Model</text:p>
            </table:table-cell>
            <table:table-cell table:style-name="Table6.A1" office:value-type="string">
              <text:p text:style-name="Table_20_Heading">Approximate Accuracy</text:p>
            </table:table-cell>
          </table:table-row>
        </table:table-header-rows>
        <table:table-row>
          <table:table-cell table:style-name="Table6.A1" office:value-type="string">
            <text:p text:style-name="Table_20_Contents">TextBlob</text:p>
          </table:table-cell>
          <table:table-cell table:style-name="Table6.A1" office:value-type="string">
            <text:p text:style-name="Table_20_Contents">~28%</text:p>
          </table:table-cell>
        </table:table-row>
        <table:table-row>
          <table:table-cell table:style-name="Table6.A1" office:value-type="string">
            <text:p text:style-name="Table_20_Contents">VADER</text:p>
          </table:table-cell>
          <table:table-cell table:style-name="Table6.A1" office:value-type="string">
            <text:p text:style-name="Table_20_Contents">~50%</text:p>
          </table:table-cell>
        </table:table-row>
        <table:table-row>
          <table:table-cell table:style-name="Table6.A1" office:value-type="string">
            <text:p text:style-name="Table_20_Contents">FinBERT</text:p>
          </table:table-cell>
          <table:table-cell table:style-name="Table6.A1" office:value-type="string">
            <text:p text:style-name="Table_20_Contents">~67%</text:p>
          </table:table-cell>
        </table:table-row>
        <table:table-row>
          <table:table-cell table:style-name="Table6.A1" office:value-type="string">
            <text:p text:style-name="Table_20_Contents">LLM-based Classification</text:p>
          </table:table-cell>
          <table:table-cell table:style-name="Table6.A1" office:value-type="string">
            <text:p text:style-name="Table_20_Contents">~92%</text:p>
          </table:table-cell>
        </table:table-row>
      </table:table>
      <text:p text:style-name="P113"><text:span text:style-name="Strong_20_Emphasis"/></text:p>
      <text:p text:style-name="P113"><text:span text:style-name="Strong_20_Emphasis">Result:</text:span> The benchmark confirmed that the selected LLM-based approach provided the most reliable classification performance for Tanzanian financial news headlines.<text:span text:style-name="T29">5.3.3 Statistical Validation</text:span></text:p>
      <text:p text:style-name="P17">Pearson correlation measured linear association between monthly sentiment variables and economic indicators. The strongest results involved the USD/TZS rate level:</text:p>
      <text:p text:style-name="P17"/>
      <text:p text:style-name="P147"/>
      <text:p text:style-name="P85">Table 5.3: Pearson Correlation Results (Sentiment vs Economic Indicators)</text:p>
      <table:table table:name="Table7" table:style-name="Table7">
        <table:table-column table:style-name="Table7.A" table:number-columns-repeated="5"/>
        <table:table-row table:style-name="Table7.1">
          <table:table-cell table:style-name="Table7.A1" office:value-type="string">
            <text:p text:style-name="P148">Rank</text:p>
          </table:table-cell>
          <table:table-cell table:style-name="Table7.A1" office:value-type="string">
            <text:p text:style-name="P148">Pair</text:p>
          </table:table-cell>
          <table:table-cell table:style-name="Table7.A1" office:value-type="string">
            <text:p text:style-name="P148">Pearson r</text:p>
          </table:table-cell>
          <table:table-cell table:style-name="Table7.A1" office:value-type="string">
            <text:p text:style-name="P148">p value</text:p>
          </table:table-cell>
          <table:table-cell table:style-name="Table7.A1" office:value-type="string">
            <text:p text:style-name="P148">Significance</text:p>
          </table:table-cell>
        </table:table-row>
        <table:table-row table:style-name="Table7.1">
          <table:table-cell table:style-name="Table7.A1" office:value-type="string">
            <text:p text:style-name="P149">1</text:p>
          </table:table-cell>
          <table:table-cell table:style-name="Table7.A1" office:value-type="string">
            <text:p text:style-name="P149">Net Sentiment vs USD/TZS Rate</text:p>
          </table:table-cell>
          <table:table-cell table:style-name="Table7.A1" office:value-type="string">
            <text:p text:style-name="P149">0.583</text:p>
          </table:table-cell>
          <table:table-cell table:style-name="Table7.A1" office:value-type="string">
            <text:p text:style-name="P149">0.0004</text:p>
          </table:table-cell>
          <table:table-cell table:style-name="Table7.A1" office:value-type="string">
            <text:p text:style-name="P149">Highly significant (p ≤ 0.01)</text:p>
          </table:table-cell>
        </table:table-row>
        <table:table-row table:style-name="Table7.1">
          <table:table-cell table:style-name="Table7.A1" office:value-type="string">
            <text:p text:style-name="P149">2</text:p>
          </table:table-cell>
          <table:table-cell table:style-name="Table7.A1" office:value-type="string">
            <text:p text:style-name="P149">Negative % vs USD/TZS Rate</text:p>
          </table:table-cell>
          <table:table-cell table:style-name="Table7.A1" office:value-type="string">
            <text:p text:style-name="P149">-0.484</text:p>
          </table:table-cell>
          <table:table-cell table:style-name="Table7.A1" office:value-type="string">
            <text:p text:style-name="P149">0.0043</text:p>
          </table:table-cell>
          <table:table-cell table:style-name="Table7.A1" office:value-type="string">
            <text:p text:style-name="P149">Highly significant (p ≤ 0.01)</text:p>
          </table:table-cell>
        </table:table-row>
        <table:table-row table:style-name="Table7.1">
          <table:table-cell table:style-name="Table7.A1" office:value-type="string">
            <text:p text:style-name="P149">3</text:p>
          </table:table-cell>
          <table:table-cell table:style-name="Table7.A1" office:value-type="string">
            <text:p text:style-name="P149">Positive % vs USD/TZS Rate</text:p>
          </table:table-cell>
          <table:table-cell table:style-name="Table7.A1" office:value-type="string">
            <text:p text:style-name="P149">0.438</text:p>
          </table:table-cell>
          <table:table-cell table:style-name="Table7.A1" office:value-type="string">
            <text:p text:style-name="P149">0.0108</text:p>
          </table:table-cell>
          <table:table-cell table:style-name="Table7.A1" office:value-type="string">
            <text:p text:style-name="P149">Significant (p ≤ 0.05)</text:p>
          </table:table-cell>
        </table:table-row>
        <table:table-row table:style-name="Table7.1">
          <table:table-cell table:style-name="Table7.A1" office:value-type="string">
            <text:p text:style-name="P149">4</text:p>
          </table:table-cell>
          <table:table-cell table:style-name="Table7.A1" office:value-type="string">
            <text:p text:style-name="P149">Net Sentiment vs Inflation %</text:p>
          </table:table-cell>
          <table:table-cell table:style-name="Table7.A1" office:value-type="string">
            <text:p text:style-name="P149">-0.413</text:p>
          </table:table-cell>
          <table:table-cell table:style-name="Table7.A1" office:value-type="string">
            <text:p text:style-name="P149">0.0170</text:p>
          </table:table-cell>
          <table:table-cell table:style-name="Table7.A1" office:value-type="string">
            <text:p text:style-name="P149">Significant (p ≤ 0.05)</text:p>
          </table:table-cell>
        </table:table-row>
        <table:table-row table:style-name="Table7.1">
          <table:table-cell table:style-name="Table7.A1" office:value-type="string">
            <text:p text:style-name="P149">5</text:p>
          </table:table-cell>
          <table:table-cell table:style-name="Table7.A1" office:value-type="string">
            <text:p text:style-name="P149">Positive % vs Inflation %</text:p>
          </table:table-cell>
          <table:table-cell table:style-name="Table7.A1" office:value-type="string">
            <text:p text:style-name="P149">-0.328</text:p>
          </table:table-cell>
          <table:table-cell table:style-name="Table7.A1" office:value-type="string">
            <text:p text:style-name="P149">0.0622</text:p>
          </table:table-cell>
          <table:table-cell table:style-name="Table7.A1" office:value-type="string">
            <text:p text:style-name="P149">Not significant</text:p>
          </table:table-cell>
        </table:table-row>
        <table:table-row table:style-name="Table7.1">
          <table:table-cell table:style-name="Table7.A1" office:value-type="string">
            <text:p text:style-name="P149">6</text:p>
          </table:table-cell>
          <table:table-cell table:style-name="Table7.A1" office:value-type="string">
            <text:p text:style-name="P149">Negative % vs Inflation %</text:p>
          </table:table-cell>
          <table:table-cell table:style-name="Table7.A1" office:value-type="string">
            <text:p text:style-name="P149">0.321</text:p>
          </table:table-cell>
          <table:table-cell table:style-name="Table7.A1" office:value-type="string">
            <text:p text:style-name="P149">0.0683</text:p>
          </table:table-cell>
          <table:table-cell table:style-name="Table7.A1" office:value-type="string">
            <text:p text:style-name="P149">Not significant</text:p>
          </table:table-cell>
        </table:table-row>
      </table:table>
      <text:p text:style-name="P37"/>
      <text:p text:style-name="P17">All pairs involving month on month Rate_Change_% had p values above 0.05 and are not statistically significant at the 5% level. This suggests media sentiment tracks the level of the exchange rate more clearly than short term FX volatility.</text:p>
      <text:p text:style-name="P37"/>
      <text:h text:style-name="P38" text:outline-level="1"><text:bookmark-start text:name="__RefHeading___Toc4443_3468845459"/>CHAPTER SIX: CONCLUSION AND RECOMMENDATION<text:bookmark-end text:name="__RefHeading___Toc4443_3468845459"/></text:h>
      <text:h text:style-name="P52" text:outline-level="2"><text:bookmark-start text:name="__RefHeading___Toc4445_3468845459"/>6.1 Introduction<text:bookmark-end text:name="__RefHeading___Toc4445_3468845459"/></text:h>
      <text:p text:style-name="P17">This chapter summarises what was achieved against each objective, discusses challenges and limitations, and offers recommendations for future work.</text:p>
      <text:h text:style-name="P52" text:outline-level="2"><text:bookmark-start text:name="__RefHeading___Toc4447_3468845459"/>6.2 Conclusion<text:bookmark-end text:name="__RefHeading___Toc4447_3468845459"/></text:h>
      <text:h text:style-name="P53" text:outline-level="3"><text:bookmark-start text:name="__RefHeading___Toc4449_3468845459"/>6.2.1 Classification Objective<text:bookmark-end text:name="__RefHeading___Toc4449_3468845459"/></text:h>
      <text:p text:style-name="P17">The project successfully classified 5,310 Tanzanian financial headlines using a Groq hosted large language model. Benchmarking showed LLM accuracy near 93%, far above rule based tools. The production run labelled 72.2% of headlines as economically relevant and assigned category and sentiment in a single API pass.</text:p>
      <text:h text:style-name="P53" text:outline-level="3"><text:bookmark-start text:name="__RefHeading___Toc4451_3468845459"/>6.2.2 Monthly Aggregation Objective<text:bookmark-end text:name="__RefHeading___Toc4451_3468845459"/></text:h>
      <text:p text:style-name="P17">Monthly sentiment scores were computed for 33 months from March 2022 to December 2024. The merged dataset combines headline counts, category dominance, sentiment shares, inflation, and exchange rate in one table suitable for time series analysis.</text:p>
      <text:h text:style-name="P53" text:outline-level="3"><text:bookmark-start text:name="__RefHeading___Toc4453_3468845459"/>6.2.3 Correlation Objective<text:bookmark-end text:name="__RefHeading___Toc4453_3468845459"/></text:h>
      <text:p text:style-name="P17">Statistical analysis found significant correlation between sentiment and the USD/TZS exchange rate. Net Sentiment correlated at r = 0.583 (p = 0.0004). Negative sentiment correlated at r = 0.484 (p = 0.0043) and Positive at r = 0.438 (p = 0.0108). Net Sentiment also correlated inversely with inflation at r = 0.413 (p = 0.017). These results support the research question that media tone relates to macro indicators, especially the exchange rate.</text:p>
      <text:h text:style-name="P53" text:outline-level="3"><text:bookmark-start text:name="__RefHeading___Toc4455_3468845459"/>6.2.4 Visualisation Objective<text:bookmark-end text:name="__RefHeading___Toc4455_3468845459"/></text:h>
      <text:p text:style-name="P17">Charts showed neutral dominance in most months, a rising USD/TZS trend from 2023 onward alongside shifting sentiment shares, and visual alignment between positive sentiment and exchange rate movement in dual axis plots. The correlation heatmap confirmed that exchange rate level had the strongest associations.</text:p>
      <text:h text:style-name="P150" text:outline-level="3"><text:bookmark-start text:name="__RefHeading___Toc4457_3468845459"/><text:soft-page-break/><text:span text:style-name="T29">6.2.5 Model Evaluation Objective</text:span><text:bookmark-end text:name="__RefHeading___Toc4457_3468845459"/></text:h>
      <text:p text:style-name="P17">LLMs proved suitable for Tanzanian financial sentiment when prompted to judge implied economic outcome. FinBERT and rule based models were insufficient. A later prompt tuning effort (v4) improved category accuracy from 59.6% to 79.9% on a 200 headline sample when using the smaller Llama 3.1 8B model, showing that prompt design matters as much as model choice.</text:p>
      <text:h text:style-name="P52" text:outline-level="2"><text:bookmark-start text:name="__RefHeading___Toc4459_3468845459"/>6.3 Challenges and Limitations<text:bookmark-end text:name="__RefHeading___Toc4459_3468845459"/></text:h>
      <text:p text:style-name="P17">Several challenges affected the project. January and February 2022 were missing from the exchange rate source, reducing monthly observations from 36 to 33. Neutral sentiment dominated most months (about 62% of relevant headlines), which compressed the signal from positive and negative labels. The General category was over assigned in early classifier runs, though prompt updates were developed to address this. The production run used Llama 3.1 8B instead of the benchmarked 70B model due to token limits on the free API tier. Finally, correlation shows association, not causation, and 33 monthly points limit statistical power.</text:p>
      <text:h text:style-name="P52" text:outline-level="2"><text:bookmark-start text:name="__RefHeading___Toc4461_3468845459"/>6.4 Recommendations<text:bookmark-end text:name="__RefHeading___Toc4461_3468845459"/></text:h>
      <text:p text:style-name="P17">Future work should re run full classification with the improved v5 prompt and expanded 11 category schema (adding Markets, Tourism, and Inflation while removing General). Additional news sources could be included using a headless browser for sites like IPP Media. The pipeline should be extended to BOT policy rate and GDP series. A simple dashboard could publish a monthly sentiment index for researchers. Publishing a labelled Tanzanian financial headline dataset would strengthen African NLP resources identified as lacking by Adelani et al. (2021).</text:p>
      <text:p text:style-name="P37"/>
      <text:h text:style-name="P38" text:outline-level="1"><text:bookmark-start text:name="__RefHeading___Toc4463_3468845459"/>REFERENCES<text:bookmark-end text:name="__RefHeading___Toc4463_3468845459"/></text:h>
      <text:p text:style-name="P151">Adelani, D. I., Abbott, J., Neubig, G., Dossou, B. F. P., Alabi, J. O., Masinde, W., ... &amp; Buzaaba, H. (2021). MasakhaNER: Named entity recognition for African languages. Transactions of the Association for Computational Linguistics, 9, 1116–1131.</text:p>
      <text:p text:style-name="P151">Araci, D. (2019). FinBERT: Financial sentiment analysis with pre-trained language models. arXiv preprint arXiv:1908.10063.</text:p>
      <text:p text:style-name="P151">Baker, S. R., Bloom, N., &amp; Davis, S. J. (2016). Measuring economic policy uncertainty. The Quarterly Journal of Economics, 131(4), 1593–1636.</text:p>
      <text:p text:style-name="P151">Bollen, J., Mao, H., &amp; Zeng, X. (2011). Twitter mood predicts the stock market. Journal of Computational Science, 2(1), 1–8.</text:p>
      <text:p text:style-name="P151">Devlin, J., Chang, M. W., Lee, K., &amp; Toutanova, K. (2018). BERT: Pre-training of deep bidirectional transformers for language understanding. arXiv preprint arXiv:1810.04805.</text:p>
      <text:p text:style-name="P151">Hutto, C. J., &amp; Gilbert, E. (2014). VADER: A parsimonious rule-based model for sentiment analysis of social media text. Proceedings of the International AAAI Conference on Web and Social Media, 8(1), 216–225.</text:p>
      <text:p text:style-name="P151">Loughran, T., &amp; McDonald, B. (2011). When is a liability not a liability? Textual analysis, dictionaries, and 10-Ks. The Journal of Finance, 66(1), 35–65.</text:p>
      <text:p text:style-name="P151">Muriungi, P., &amp; Kimani, D. (2020). Media sentiment and exchange rate volatility: Evidence from Kenyan financial news. African Journal of Economics and Finance, 8(2), 45–61.</text:p>
      <text:p text:style-name="P151">National Bureau of Statistics Tanzania. (2024). Consumer Price Index (CPI) summary data [Data set].</text:p>
      <text:p text:style-name="P152"><text:span text:style-name="T77">Pressman, R. S., &amp; Maxim, B. R. (2020). </text:span><text:span text:style-name="Emphasis"><text:span text:style-name="T77">Software Engineering: A Practitioner’s Approach</text:span></text:span><text:span text:style-name="T77"> (9th ed.). McGraw-Hill.</text:span> </text:p>
      <text:p text:style-name="P151">Shapiro, A. H., Sudhof, M., &amp; Wilson, D. J. (2022). Measuring news sentiment. Journal of Econometrics, 228(2), 221–243.</text:p>
      <text:p text:style-name="P153"><text:span text:style-name="T77">Sommerville, I. (2016). </text:span><text:span text:style-name="Emphasis"><text:span text:style-name="T77">Software Engineering</text:span></text:span><text:span text:style-name="T77"> (10th ed.). Pearson Education. </text:span></text:p>
      <text:p text:style-name="P151"><text:soft-page-break/>Tetlock, P. C. (2007). Giving content to investor sentiment: The role of media in the stock market. The Journal of Finance, 62(3), 1139–1168.</text:p>
      <text:p text:style-name="P154"/>
      <text:p text:style-name="Text_20_body"><text:span text:style-name="T78"/></text:p>
      <text:p text:style-name="P37"/>
      <text:h text:style-name="P38" text:outline-level="1"><text:bookmark-start text:name="__RefHeading___Toc4465_3468845459"/>APPENDIX<text:bookmark-end text:name="__RefHeading___Toc4465_3468845459"/></text:h>
      <text:p text:style-name="P17">No questionnaire was used in this project. Data collection relied on publicly available news archives and official economic statistics. Sample headline records are available in EF-02/data/processed/tz_headlines_labelled.csv.</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roman" style:font-pitch="variable" style:font-charset="x-symbol"/>
    <style:font-face style:name="Courier" svg:font-family="Courier"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imbusRomNo9L-Regu" svg:font-family="NimbusRomNo9L-Regu"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Cambria" fo:font-size="11pt" fo:language="en" fo:country="US" style:letter-kerning="false" style:font-name-asian="ＭＳ 明朝"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line-height="150%" fo:text-align="justify" style:justify-single-word="false" fo:orphans="2" fo:widows="2"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0835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text-align="center" style:justify-single-word="false" fo:keep-together="always" fo:keep-with-next="always"/>
      <style:text-properties fo:color="#000000"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000000"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000000" loext:opacity="100%" style:font-name="Calibri" fo:font-family="Calibri" style:font-family-generic="roman" style:font-pitch="variable" fo:font-size="12pt" fo:font-weight="bold" style:font-name-asian="ＭＳ ゴシック" style:font-family-asian="'ＭＳ ゴシック'" style:font-family-generic-asian="system" style:font-pitch-asian="variable" style:font-size-asian="12pt" style:font-weight-asian="bold" style:font-name-complex="Tahoma" style:font-family-complex="Tahoma" style:font-family-generic-complex="system" style:font-pitch-complex="variable" style:font-weight-complex="bold"/>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Tahoma" style:font-family-complex="Tahoma"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lef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Tahoma" style:font-family-complex="Tahoma"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0835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0835in" style:contextual-spacing="true" fo:text-indent="-0.25in" style:auto-text-indent="false"/>
    </style:style>
    <style:style style:name="List_20_3_20__28_WW_29_" style:display-name="List 3 (WW)" style:family="paragraph" style:parent-style-name="Standard">
      <style:paragraph-properties fo:margin-left="0.75in" fo:margin-top="0in" fo:margin-bottom="0.0835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0835in" style:contextual-spacing="true"/>
    </style:style>
    <style:style style:name="List_20_2" style:display-name="List 2" style:family="paragraph" style:parent-style-name="Standard" style:list-style-name="WWNum2" style:class="list">
      <style:paragraph-properties fo:margin-top="0in" fo:margin-bottom="0.0835in" style:contextual-spacing="true"/>
    </style:style>
    <style:style style:name="List_20_3" style:display-name="List 3" style:family="paragraph" style:parent-style-name="Standard" style:list-style-name="WWNum3" style:class="list">
      <style:paragraph-properties fo:margin-top="0in" fo:margin-bottom="0.0835in" style:contextual-spacing="true"/>
    </style:style>
    <style:style style:name="Numbering_20_1" style:display-name="Numbering 1" style:family="paragraph" style:parent-style-name="Standard" style:list-style-name="WWNum5" style:class="list">
      <style:paragraph-properties fo:margin-top="0in" fo:margin-bottom="0.0835in" style:contextual-spacing="true"/>
    </style:style>
    <style:style style:name="Numbering_20_2" style:display-name="Numbering 2" style:family="paragraph" style:parent-style-name="Standard" style:list-style-name="WWNum6" style:class="list">
      <style:paragraph-properties fo:margin-top="0in" fo:margin-bottom="0.0835in" style:contextual-spacing="true"/>
    </style:style>
    <style:style style:name="Numbering_20_3" style:display-name="Numbering 3" style:family="paragraph" style:parent-style-name="Standard" style:list-style-name="WWNum7" style:class="list">
      <style:paragraph-properties fo:margin-top="0in" fo:margin-bottom="0.0835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lef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Table_20_Contents" style:display-name="Table Contents" style:family="paragraph" style:parent-style-name="Standard" style:class="extra">
      <style:paragraph-properties fo:orphans="0" fo:widows="0" text:number-lines="false" text:line-number="0"/>
    </style:style>
    <style:style style:name="normal" style:family="paragraph">
      <style:paragraph-properties fo:margin-top="0in" fo:margin-bottom="0in" style:contextual-spacing="false" fo:text-align="left" style:justify-single-word="false" fo:orphans="2" fo:widows="2" style:writing-mode="lr-tb"/>
    </style:style>
    <style:style style:name="Contents_20_1" style:display-name="Contents 1" style:family="paragraph" style:parent-style-name="Index" style:class="index">
      <style:paragraph-properties fo:margin-lef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5.6063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5.4098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Tahoma" style:font-family-complex="Tahoma"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Tahoma" style:font-family-complex="Tahoma"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text-properties style:font-name="Cambria1" fo:font-family="Cambria" style:font-family-generic="roman" style:font-pitch="variable" style:font-charset="x-symbol"/>
    </style:style>
    <style:style style:name="ListLabel_20_2" style:display-name="ListLabel 2" style:family="text">
      <style:text-properties style:font-name="Cambria1" fo:font-family="Cambria" style:font-family-generic="roman" style:font-pitch="variable" style:font-charset="x-symbol"/>
    </style:style>
    <style:style style:name="ListLabel_20_3" style:display-name="ListLabel 3" style:family="text">
      <style:text-properties style:font-name="Cambria1" fo:font-family="Cambria" style:font-family-generic="roman" style:font-pitch="variable" style:font-charset="x-symbol"/>
    </style:style>
    <style:style style:name="ListLabel_20_4" style:display-name="ListLabel 4" style:family="text">
      <style:text-properties style:font-name="Cambria1" fo:font-family="Cambria" style:font-family-generic="roman" style:font-pitch="variable" style:font-charset="x-symbol"/>
    </style:style>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fontstyle01" style:family="text" style:parent-style-name="Default_20_Paragraph_20_Font">
      <style:text-properties fo:color="#000000" loext:opacity="100%" style:font-name="Times New Roman" fo:font-family="'Times New Roman'" style:font-family-generic="roman" style:font-pitch="variable" fo:font-size="12pt" fo:font-style="normal" fo:font-weight="bold" style:font-size-asian="12pt" style:font-style-asian="normal" style:font-weight-asian="bold" style:font-name-complex="Times New Roman1" style:font-family-complex="'Times New Roman'" style:font-family-generic-complex="system" style:font-pitch-complex="variable" style:font-size-complex="12pt" style:font-style-complex="normal"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Numbering_20_Symbols"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1in" fo:margin-bottom="1in" fo:margin-left="1.25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701in" fo:page-height="11.6902in" style:num-format="1" style:print-orientation="portrait" fo:margin-top="0.5in" fo:margin-bottom="0.5in" fo:margin-left="0.5in" fo:margin-right="0.5in" fo:border="3pt outset #000000" fo:padding="0.2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10" style:page-usage="mirrored">
      <style:page-layout-properties fo:page-width="8.2681in" fo:page-height="11.6929in" style:num-format="i" style:print-orientation="portrait" fo:margin-top="1in" fo:margin-bottom="1in" fo:margin-left="1.25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31</text:page-number><text:bookmark-end text:name="PageNumWizard_FOOTER_Default Page Style1"/></text:p>
      </style:footer>
    </style:master-page>
    <style:master-page style:name="First_20_Page" style:display-name="First Page" style:page-layout-name="Mpm2" draw:style-name="Mdp1" style:next-style-name="Standard"/>
    <style:master-page style:name="Index" style:page-layout-name="Mpm3" draw:style-name="Mdp1"/>
    <style:master-page style:name="Landscape" style:page-layout-name="Mpm4" draw:style-name="Mdp1"/>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HTML" style:page-layout-name="Mpm8" draw:style-name="Mdp1"/>
    <style:master-page style:name="Footnote" style:page-layout-name="Mpm9" draw:style-name="Mdp1"/>
    <style:master-page style:name="Endnote" style:page-layout-name="Mpm9" draw:style-name="Mdp1"/>
    <style:master-page style:name="prefix" style:page-layout-name="Mpm10" draw:style-name="Mdp1">
      <style:footer>
        <text:p text:style-name="MP1"><text:bookmark-start text:name="PageNumWizard_FOOTER_prefix1"/><text:page-number text:select-page="current">x</text:page-number><text:bookmark-end text:name="PageNumWizard_FOOTER_prefix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python-docx</meta:initial-creator>
    <dc:description>generated by python-docx</dc:description>
    <meta:editing-cycles>7</meta:editing-cycles>
    <meta:creation-date>2013-12-23T23:15:00</meta:creation-date>
    <dc:date>2026-06-29T11:25:33.173625400</dc:date>
    <meta:editing-duration>PT15H32M57S</meta:editing-duration>
    <meta:generator>LibreOffice/26.2.4.2$Windows_X86_64 LibreOffice_project/0229ac93fcf0d7cbc6376066c6f35021cef002dc</meta:generator>
    <meta:document-statistic meta:table-count="8" meta:image-count="12" meta:object-count="0" meta:page-count="43" meta:paragraph-count="507" meta:word-count="6686" meta:character-count="46470" meta:non-whitespace-character-count="40291"/>
    <meta:user-defined meta:name="AppVersion">14.0000</meta:user-defined>
    <meta:template xlink:type="simple" xlink:actuate="onRequest" xlink:title="Normal.dotm" xlink:href=""/>
  </office:meta>
</office:document-meta>
</file>